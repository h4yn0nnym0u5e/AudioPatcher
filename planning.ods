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fd7d7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ffffff" fo:min-height="107.65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3.8mm" svg:height="107.65mm" svg:x="224.83mm" svg:y="196.03mm">
            <draw:text-box>
              <text:p>When a MIDI Note On is received, we want to:</text:p>
              <text:p>* EXCEPT if it’s the first / only playing voice...</text:p>
              <text:p>* ...create copies of all objects marked as “per-voice”: keep in a separate list-of-lists</text:p>
              <text:p>* ...create all internal-only connections</text:p>
              <text:p>* ...create all input connections (coming from “global” objects e.g. master LFO)</text:p>
              <text:p>* ...create only output connections if they go to a mixer object with free inputs</text:p>
              <text:p>* set frequencies for waveform and tracking filter objects from note pitch</text:p>
              <text:p>* send noteOn() to all per-voice envelopes</text:p>
              <text:p>* set other parameters from velocity: TBD</text:p>
              <text:p/>
              <text:p>When MIDI Note Off is received:</text:p>
              <text:p>* send noteOff() to all per-voice envelopes</text:p>
              <text:p>* EXCEPT if the voice is the master design...</text:p>
              <text:p>* ...move per-voice object list to “releasing” list</text:p>
              <text:p/>
              <text:p>When all envelopes in a releasing list entry are inactive:</text:p>
              <text:p>* delete all patchcords connected to them</text:p>
              <text:p>* delete all the objects</text:p>
              <text:p/>
              <text:p>Thoughts:</text:p>
              <text:p>* Allow WaveformDc object to capture note pitch and velocity</text:p>
              <text:p/>
              <text:p/>
            </draw:text-box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528a</text:p>
          </table:table-cell>
          <table:table-cell table:formula="of:=HEX2DEC(MID([.H3];3;999))" office:value-type="float" office:value="21130" calcext:value-type="float">
            <text:p>21130</text:p>
          </table:table-cell>
          <table:table-cell table:formula="of:=BITAND([.I3];63488)/2048*8" office:value-type="float" office:value="80" calcext:value-type="float">
            <text:p>80</text:p>
          </table:table-cell>
          <table:table-cell table:formula="of:=BITAND([.I3];2016)/32*4" office:value-type="float" office:value="80" calcext:value-type="float">
            <text:p>80</text:p>
          </table:table-cell>
          <table:table-cell table:formula="of:=BITAND([.I3];31)*8" office:value-type="float" office:value="80" calcext:value-type="float">
            <text:p>80</text:p>
          </table:table-cell>
          <table:table-cell table:formula="of:=&quot;0x&quot;&amp;DEC2HEX(INT([.J3]/8)*2048+INT([.K3]/4)*32+INT([.L3]/8))" office:value-type="string" office:string-value="0x528A" calcext:value-type="string">
            <text:p>0x528A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table:number-columns-repeated="2" office:value-type="float" office:value="80" calcext:value-type="float">
            <text:p>80</text:p>
          </table:table-cell>
          <table:table-cell table:formula="of:=[.K4]" office:value-type="float" office:value="80" calcext:value-type="float">
            <text:p>80</text:p>
          </table:table-cell>
          <table:table-cell table:formula="of:=&quot;0x&quot;&amp;DEC2HEX(INT([.J4]/8)*2048+INT([.K4]/4)*32+INT([.L4]/8))" office:value-type="string" office:string-value="0x528A" calcext:value-type="string">
            <text:p>0x528A</text:p>
          </table:table-cell>
          <table:table-cell table:number-columns-repeated="2"/>
          <table:table-cell table:formula="of:=LOG([.P3]/[.P2])/LOG([.P1])" office:value-type="float" office:value="10.9657842846621" calcext:value-type="float">
            <text:p>10.965784284662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formula="of:=[.M4]" office:value-type="string" office:string-value="0x528A" calcext:value-type="string">
            <text:p>0x528A</text:p>
          </table:table-cell>
          <table:table-cell table:formula="of:=HEX2DEC(MID([.H5];3;999))" office:value-type="float" office:value="21130" calcext:value-type="float">
            <text:p>21130</text:p>
          </table:table-cell>
          <table:table-cell table:formula="of:=BITAND([.I5];63488)/2048*8" office:value-type="float" office:value="80" calcext:value-type="float">
            <text:p>80</text:p>
          </table:table-cell>
          <table:table-cell table:formula="of:=BITAND([.I5];2016)/32*4" office:value-type="float" office:value="80" calcext:value-type="float">
            <text:p>80</text:p>
          </table:table-cell>
          <table:table-cell table:formula="of:=BITAND([.I5];31)*8" office:value-type="float" office:value="80" calcext:value-type="float">
            <text:p>80</text:p>
          </table:table-cell>
          <table:table-cell table:formula="of:=&quot;0x&quot;&amp;DEC2HEX(INT([.J5]/8)*2048+INT([.K5]/4)*32+INT([.L5]/8))" office:value-type="string" office:string-value="0x528A" calcext:value-type="string">
            <text:p>0x528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P$1]^([.O7]*[.P$4]/130)*[.P$2]" office:value-type="float" office:value="5" calcext:value-type="float">
            <text:p>5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style-name="ce3" table:formula="of:=[.P$1]^([.O8]*[.P$4]/130)*[.P$2]" office:value-type="float" office:value="8.97212650928862" calcext:value-type="float">
            <text:p>8.97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style-name="ce3" table:formula="of:=[.P$1]^([.O9]*[.P$4]/130)*[.P$2]" office:value-type="float" office:value="16.0998108197359" calcext:value-type="float">
            <text:p>16.10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style-name="ce3" table:formula="of:=[.P$1]^([.O10]*[.P$4]/130)*[.P$2]" office:value-type="float" office:value="28.8899078900569" calcext:value-type="float">
            <text:p>28.89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style-name="ce3" table:formula="of:=[.P$1]^([.O11]*[.P$4]/130)*[.P$2]" office:value-type="float" office:value="51.8407816862572" calcext:value-type="float">
            <text:p>51.84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style-name="ce3" table:formula="of:=[.P$1]^([.O12]*[.P$4]/130)*[.P$2]" office:value-type="float" office:value="93.0244103259025" calcext:value-type="float">
            <text:p>93.0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style-name="ce3" table:formula="of:=[.P$1]^([.O13]*[.P$4]/130)*[.P$2]" office:value-type="float" office:value="166.925355579194" calcext:value-type="float">
            <text:p>166.9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style-name="ce3" table:formula="of:=[.P$1]^([.O14]*[.P$4]/130)*[.P$2]" office:value-type="float" office:value="299.535081572904" calcext:value-type="float">
            <text:p>299.5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style-name="ce3" table:formula="of:=[.P$1]^([.O15]*[.P$4]/130)*[.P$2]" office:value-type="float" office:value="537.493329168436" calcext:value-type="float">
            <text:p>537.4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style-name="ce3" table:formula="of:=[.P$1]^([.O16]*[.P$4]/130)*[.P$2]" office:value-type="float" office:value="964.491629439585" calcext:value-type="float">
            <text:p>964.4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style-name="ce3" table:formula="of:=[.P$1]^([.O17]*[.P$4]/130)*[.P$2]" office:value-type="float" office:value="1730.70818329638" calcext:value-type="float">
            <text:p>1730.7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style-name="ce3" table:formula="of:=[.P$1]^([.O18]*[.P$4]/130)*[.P$2]" office:value-type="float" office:value="3105.62655423923" calcext:value-type="float">
            <text:p>3105.6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style-name="ce3" table:formula="of:=[.P$1]^([.O19]*[.P$4]/130)*[.P$2]" office:value-type="float" office:value="5572.8148670481" calcext:value-type="float">
            <text:p>5572.81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style-name="ce3" table:formula="of:=[.P$1]^([.O20]*[.P$4]/130)*[.P$2]" office:value-type="float" office:value="10000" calcext:value-type="float">
            <text:p>10000.0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24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1"/>
          <table:table-cell office:value-type="string" calcext:value-type="string">
            <text:p>base</text:p>
          </table:table-cell>
          <table:table-cell table:formula="of:=1200/60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14"/>
          <table:table-cell office:value-type="string" calcext:value-type="string">
            <text:p>octav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LOG([.O25])/LOG(2)" office:value-type="float" office:value="2.32192809488736" calcext:value-type="float">
            <text:p>2.32192809488736</text:p>
          </table:table-cell>
          <table:table-cell table:number-columns-repeated="2"/>
          <table:table-cell office:value-type="string" calcext:value-type="string">
            <text:p>Hammond notes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11"/>
          <table:table-cell office:value-type="string" calcext:value-type="string">
            <text:p>Note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[.T27]/[.U27]" office:value-type="float" office:value="0.817307692307692" calcext:value-type="float">
            <text:p>0.817307692307692</text:p>
          </table:table-cell>
          <table:table-cell table:formula="of:=[.V27]*[.$W$23]*2^[.$W$24]" office:value-type="float" office:value="32.6923076923077" calcext:value-type="float">
            <text:p>32.6923076923077</text:p>
          </table:table-cell>
          <table:table-cell/>
          <table:table-cell table:formula="of:=[.T27]&amp;&quot;.0f /&quot;&amp;[.U27]&amp;&quot;.0f * HAMMOND_BASE, // &quot;&amp;[.S27]" office:value-type="string" office:string-value="85.0f /104.0f * HAMMOND_BASE, // C" calcext:value-type="string">
            <text:p>85.0f /104.0f * HAMMOND_BASE, // 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trl / enc setting:</text:p>
          </table:table-cell>
          <table:table-cell table:number-columns-repeated="14"/>
          <table:table-cell office:value-type="string" calcext:value-type="string">
            <text:p>C#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[.T28]/[.U28]" office:value-type="float" office:value="0.865853658536585" calcext:value-type="float">
            <text:p>0.865853658536585</text:p>
          </table:table-cell>
          <table:table-cell table:formula="of:=[.V28]*[.$W$23]*2^[.$W$24]" office:value-type="float" office:value="34.6341463414634" calcext:value-type="float">
            <text:p>34.6341463414634</text:p>
          </table:table-cell>
          <table:table-cell/>
          <table:table-cell table:formula="of:=[.T28]&amp;&quot;.0f /&quot;&amp;[.U28]&amp;&quot;.0f * HAMMOND_BASE, // &quot;&amp;[.S28]" office:value-type="string" office:string-value="71.0f /82.0f * HAMMOND_BASE, // C#" calcext:value-type="string">
            <text:p>71.0f /82.0f * HAMMOND_BASE, // C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office:value-type="float" office:value="272.52" calcext:value-type="float">
            <text:p>272.52</text:p>
          </table:table-cell>
          <table:table-cell office:value-type="string" calcext:value-type="string">
            <text:p>Hz</text:p>
          </table:table-cell>
          <table:table-cell table:number-columns-repeated="6"/>
          <table:table-cell office:value-type="string" calcext:value-type="string">
            <text:p>MIDI settings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formula="of:=[.T29]/[.U29]" office:value-type="float" office:value="0.917808219178082" calcext:value-type="float">
            <text:p>0.917808219178082</text:p>
          </table:table-cell>
          <table:table-cell table:formula="of:=[.V29]*[.$W$23]*2^[.$W$24]" office:value-type="float" office:value="36.7123287671233" calcext:value-type="float">
            <text:p>36.7123287671233</text:p>
          </table:table-cell>
          <table:table-cell/>
          <table:table-cell table:formula="of:=[.T29]&amp;&quot;.0f /&quot;&amp;[.U29]&amp;&quot;.0f * HAMMOND_BASE, // &quot;&amp;[.S29]" office:value-type="string" office:string-value="67.0f /73.0f * HAMMOND_BASE, // D" calcext:value-type="string">
            <text:p>67.0f /73.0f * HAMMOND_BASE, // 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g2(freq)</text:p>
          </table:table-cell>
          <table:table-cell table:formula="of:=LOG([.E29])/LOG(2)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Waveform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amp scaling</text:p>
          </table:table-cell>
          <table:table-cell table:number-columns-repeated="2"/>
          <table:table-cell office:value-type="string" calcext:value-type="string">
            <text:p>D#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[.T30]/[.U30]" office:value-type="float" office:value="0.972222222222222" calcext:value-type="float">
            <text:p>0.972222222222222</text:p>
          </table:table-cell>
          <table:table-cell table:formula="of:=[.V30]*[.$W$23]*2^[.$W$24]" office:value-type="float" office:value="38.8888888888889" calcext:value-type="float">
            <text:p>38.8888888888889</text:p>
          </table:table-cell>
          <table:table-cell/>
          <table:table-cell table:formula="of:=[.T30]&amp;&quot;.0f /&quot;&amp;[.U30]&amp;&quot;.0f * HAMMOND_BASE, // &quot;&amp;[.S30]" office:value-type="string" office:string-value="105.0f /108.0f * HAMMOND_BASE, // D#" calcext:value-type="string">
            <text:p>105.0f /108.0f * HAMMOND_BASE, // D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G_NOTE_A</text:p>
          </table:table-cell>
          <table:table-cell table:formula="of:=[.F14]-INT([.F14])" office:value-type="float" office:value="0.78135971352466" calcext:value-type="float">
            <text:p>0.78135971352466</text:p>
          </table:table-cell>
          <table:table-cell table:number-columns-repeated="8"/>
          <table:table-cell table:style-name="ce9" office:value-type="string" calcext:value-type="string">
            <text:p>CC</text:p>
          </table:table-cell>
          <table:table-cell office:value-type="string" calcext:value-type="string">
            <text:p>pulse width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formula="of:=[.T31]/[.U31]" office:value-type="float" office:value="1.03" calcext:value-type="float">
            <text:p>1.03</text:p>
          </table:table-cell>
          <table:table-cell table:formula="of:=[.V31]*[.$W$23]*2^[.$W$24]" office:value-type="float" office:value="41.2" calcext:value-type="float">
            <text:p>41.2</text:p>
          </table:table-cell>
          <table:table-cell/>
          <table:table-cell table:formula="of:=[.T31]&amp;&quot;.0f /&quot;&amp;[.U31]&amp;&quot;.0f * HAMMOND_BASE, // &quot;&amp;[.S31]" office:value-type="string" office:string-value="103.0f /100.0f * HAMMOND_BASE, // E" calcext:value-type="string">
            <text:p>103.0f /100.0f * HAMMOND_BASE, // 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prt</text:p>
          </table:table-cell>
          <table:table-cell table:formula="of:=FLOOR([.E30]-[.E31])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formula="of:=[.T32]/[.U32]" office:value-type="float" office:value="1.09090909090909" calcext:value-type="float">
            <text:p>1.09090909090909</text:p>
          </table:table-cell>
          <table:table-cell table:formula="of:=[.V32]*[.$W$23]*2^[.$W$24]" office:value-type="float" office:value="43.6363636363636" calcext:value-type="float">
            <text:p>43.6363636363636</text:p>
          </table:table-cell>
          <table:table-cell/>
          <table:table-cell table:formula="of:=[.T32]&amp;&quot;.0f /&quot;&amp;[.U32]&amp;&quot;.0f * HAMMOND_BASE, // &quot;&amp;[.S32]" office:value-type="string" office:string-value="84.0f /77.0f * HAMMOND_BASE, // F" calcext:value-type="string">
            <text:p>84.0f /77.0f * HAMMOND_BASE, // F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ac</text:p>
          </table:table-cell>
          <table:table-cell table:formula="of:=[.E30]-[.E32]-[.E31]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envelope</text:p>
          </table:table-cell>
          <table:table-cell table:style-name="ce8" office:value-type="string" calcext:value-type="string">
            <text:p>note on</text:p>
          </table:table-cell>
          <table:table-cell table:number-columns-repeated="4"/>
          <table:table-cell office:value-type="string" calcext:value-type="string">
            <text:p>F#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formula="of:=[.T33]/[.U33]" office:value-type="float" office:value="1.15625" calcext:value-type="float">
            <text:p>1.15625</text:p>
          </table:table-cell>
          <table:table-cell table:formula="of:=[.V33]*[.$W$23]*2^[.$W$24]" office:value-type="float" office:value="46.25" calcext:value-type="float">
            <text:p>46.25</text:p>
          </table:table-cell>
          <table:table-cell/>
          <table:table-cell table:formula="of:=[.T33]&amp;&quot;.0f /&quot;&amp;[.U33]&amp;&quot;.0f * HAMMOND_BASE, // &quot;&amp;[.S33]" office:value-type="string" office:string-value="74.0f /64.0f * HAMMOND_BASE, // F#" calcext:value-type="string">
            <text:p>74.0f /64.0f * HAMMOND_BASE, // F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c value</text:p>
          </table:table-cell>
          <table:table-cell table:formula="of:=IF([.E33]&gt;0.5;1;0)+[.E32]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T34]/[.U34]" office:value-type="float" office:value="1.225" calcext:value-type="float">
            <text:p>1.225</text:p>
          </table:table-cell>
          <table:table-cell table:formula="of:=[.V34]*[.$W$23]*2^[.$W$24]" office:value-type="float" office:value="49" calcext:value-type="float">
            <text:p>49</text:p>
          </table:table-cell>
          <table:table-cell/>
          <table:table-cell table:formula="of:=[.T34]&amp;&quot;.0f /&quot;&amp;[.U34]&amp;&quot;.0f * HAMMOND_BASE, // &quot;&amp;[.S34]" office:value-type="string" office:string-value="98.0f /80.0f * HAMMOND_BASE, // G" calcext:value-type="string">
            <text:p>98.0f /80.0f * HAMMOND_BASE, // 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frac</text:p>
          </table:table-cell>
          <table:table-cell table:formula="of:=IF([.E33]&gt;0.5;[.E33]-1;[.E33])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WaveformDc</text:p>
          </table:table-cell>
          <table:table-cell table:style-name="ce9" office:value-type="string" calcext:value-type="string">
            <text:p>CC</text:p>
          </table:table-cell>
          <table:table-cell office:value-type="string" calcext:value-type="string">
            <text:p>amplitude</text:p>
          </table:table-cell>
          <table:table-cell table:number-columns-repeated="3"/>
          <table:table-cell office:value-type="string" calcext:value-type="string">
            <text:p>G#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formula="of:=[.T35]/[.U35]" office:value-type="float" office:value="1.2972972972973" calcext:value-type="float">
            <text:p>1.2972972972973</text:p>
          </table:table-cell>
          <table:table-cell table:formula="of:=[.V35]*[.$W$23]*2^[.$W$24]" office:value-type="float" office:value="51.8918918918919" calcext:value-type="float">
            <text:p>51.8918918918919</text:p>
          </table:table-cell>
          <table:table-cell/>
          <table:table-cell table:formula="of:=[.T35]&amp;&quot;.0f /&quot;&amp;[.U35]&amp;&quot;.0f * HAMMOND_BASE, // &quot;&amp;[.S35]" office:value-type="string" office:string-value="96.0f /74.0f * HAMMOND_BASE, // G#" calcext:value-type="string">
            <text:p>96.0f /74.0f * HAMMOND_BASE, // G#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[.E34]+[.E35]+[.E31]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Ladder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formula="of:=[.T36]/[.U36]" office:value-type="float" office:value="1.375" calcext:value-type="float">
            <text:p>1.375</text:p>
          </table:table-cell>
          <table:table-cell table:formula="of:=[.V36]*[.$W$23]*2^[.$W$24]" office:value-type="float" office:value="55" calcext:value-type="float">
            <text:p>55</text:p>
          </table:table-cell>
          <table:table-cell/>
          <table:table-cell table:formula="of:=[.T36]&amp;&quot;.0f /&quot;&amp;[.U36]&amp;&quot;.0f * HAMMOND_BASE, // &quot;&amp;[.S36]" office:value-type="string" office:string-value="88.0f /64.0f * HAMMOND_BASE, // A" calcext:value-type="string">
            <text:p>88.0f /64.0f * HAMMOND_BASE, // 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table:formula="of:=2^[.E36]" office:value-type="float" office:value="272.52" calcext:value-type="float">
            <text:p>272.52</text:p>
          </table:table-cell>
          <table:table-cell table:number-columns-repeated="7"/>
          <table:table-cell office:value-type="string" calcext:value-type="string">
            <text:p>Biquad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table:number-columns-repeated="3"/>
          <table:table-cell office:value-type="string" calcext:value-type="string">
            <text:p>A#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formula="of:=[.T37]/[.U37]" office:value-type="float" office:value="1.45652173913043" calcext:value-type="float">
            <text:p>1.45652173913043</text:p>
          </table:table-cell>
          <table:table-cell table:formula="of:=[.V37]*[.$W$23]*2^[.$W$24]" office:value-type="float" office:value="58.2608695652174" calcext:value-type="float">
            <text:p>58.2608695652174</text:p>
          </table:table-cell>
          <table:table-cell/>
          <table:table-cell table:formula="of:=[.T37]&amp;&quot;.0f /&quot;&amp;[.U37]&amp;&quot;.0f * HAMMOND_BASE, // &quot;&amp;[.S37]" office:value-type="string" office:string-value="67.0f /46.0f * HAMMOND_BASE, // A#" calcext:value-type="string">
            <text:p>67.0f /46.0f * HAMMOND_BASE, // A#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VF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[.T38]/[.U38]" office:value-type="float" office:value="1.54285714285714" calcext:value-type="float">
            <text:p>1.54285714285714</text:p>
          </table:table-cell>
          <table:table-cell table:formula="of:=[.V38]*[.$W$23]*2^[.$W$24]" office:value-type="float" office:value="61.7142857142857" calcext:value-type="float">
            <text:p>61.7142857142857</text:p>
          </table:table-cell>
          <table:table-cell/>
          <table:table-cell table:formula="of:=[.T38]&amp;&quot;.0f /&quot;&amp;[.U38]&amp;&quot;.0f * HAMMOND_BASE, // &quot;&amp;[.S38]" office:value-type="string" office:string-value="108.0f /70.0f * HAMMOND_BASE, // B" calcext:value-type="string">
            <text:p>108.0f /70.0f * HAMMOND_BASE, // B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7+0.000493+[.E31]" office:value-type="float" office:value="7.78185271352466" calcext:value-type="float">
            <text:p>7.78185271352466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2^[.E39]" office:value-type="float" office:value="220.075191589765" calcext:value-type="float">
            <text:p>220.075191589765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Need to track attached CCs for when new note starts</text:p>
          </table:table-cell>
          <table:table-cell table:number-columns-repeated="1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1"/>
          <table:table-cell table:style-name="ce14" office:value-type="string" calcext:value-type="string">
            <text:p>C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0.817307692" calcext:value-type="float">
            <text:p>0.817307692</text:p>
          </table:table-cell>
          <table:table-cell/>
          <table:table-cell table:formula="of:=[.W43]+0" office:value-type="float" office:value="85" calcext:value-type="float">
            <text:p>85</text:p>
          </table:table-cell>
          <table:table-cell table:formula="of:=[.X43]+0" office:value-type="float" office:value="104" calcext:value-type="float">
            <text:p>104</text:p>
          </table:table-cell>
          <table:table-cell table:formula="of:=[.Y43]+0" office:value-type="float" office:value="0.817307692" calcext:value-type="float">
            <text:p>0.817307692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C#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.865853659" calcext:value-type="float">
            <text:p>0.865853659</text:p>
          </table:table-cell>
          <table:table-cell/>
          <table:table-cell table:formula="of:=[.W44]+0" office:value-type="float" office:value="71" calcext:value-type="float">
            <text:p>71</text:p>
          </table:table-cell>
          <table:table-cell table:formula="of:=[.X44]+0" office:value-type="float" office:value="82" calcext:value-type="float">
            <text:p>82</text:p>
          </table:table-cell>
          <table:table-cell table:formula="of:=[.Y44]+0" office:value-type="float" office:value="0.865853659" calcext:value-type="float">
            <text:p>0.865853659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D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0.917808219" calcext:value-type="float">
            <text:p>0.917808219</text:p>
          </table:table-cell>
          <table:table-cell/>
          <table:table-cell table:formula="of:=[.W45]+0" office:value-type="float" office:value="67" calcext:value-type="float">
            <text:p>67</text:p>
          </table:table-cell>
          <table:table-cell table:formula="of:=[.X45]+0" office:value-type="float" office:value="73" calcext:value-type="float">
            <text:p>73</text:p>
          </table:table-cell>
          <table:table-cell table:formula="of:=[.Y45]+0" office:value-type="float" office:value="0.917808219" calcext:value-type="float">
            <text:p>0.917808219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D#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0.972222222" calcext:value-type="float">
            <text:p>0.972222222</text:p>
          </table:table-cell>
          <table:table-cell/>
          <table:table-cell table:formula="of:=[.W46]+0" office:value-type="float" office:value="105" calcext:value-type="float">
            <text:p>105</text:p>
          </table:table-cell>
          <table:table-cell table:formula="of:=[.X46]+0" office:value-type="float" office:value="108" calcext:value-type="float">
            <text:p>108</text:p>
          </table:table-cell>
          <table:table-cell table:formula="of:=[.Y46]+0" office:value-type="float" office:value="0.972222222" calcext:value-type="float">
            <text:p>0.972222222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E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03" calcext:value-type="float">
            <text:p>1.03</text:p>
          </table:table-cell>
          <table:table-cell/>
          <table:table-cell table:formula="of:=[.W47]+0" office:value-type="float" office:value="103" calcext:value-type="float">
            <text:p>103</text:p>
          </table:table-cell>
          <table:table-cell table:formula="of:=[.X47]+0" office:value-type="float" office:value="100" calcext:value-type="float">
            <text:p>100</text:p>
          </table:table-cell>
          <table:table-cell table:formula="of:=[.Y47]+0" office:value-type="float" office:value="1.03" calcext:value-type="float">
            <text:p>1.03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F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.090909091" calcext:value-type="float">
            <text:p>1.090909091</text:p>
          </table:table-cell>
          <table:table-cell/>
          <table:table-cell table:formula="of:=[.W48]+0" office:value-type="float" office:value="84" calcext:value-type="float">
            <text:p>84</text:p>
          </table:table-cell>
          <table:table-cell table:formula="of:=[.X48]+0" office:value-type="float" office:value="77" calcext:value-type="float">
            <text:p>77</text:p>
          </table:table-cell>
          <table:table-cell table:formula="of:=[.Y48]+0" office:value-type="float" office:value="1.090909091" calcext:value-type="float">
            <text:p>1.090909091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F#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.15625" calcext:value-type="float">
            <text:p>1.15625</text:p>
          </table:table-cell>
          <table:table-cell/>
          <table:table-cell table:formula="of:=[.W49]+0" office:value-type="float" office:value="74" calcext:value-type="float">
            <text:p>74</text:p>
          </table:table-cell>
          <table:table-cell table:formula="of:=[.X49]+0" office:value-type="float" office:value="64" calcext:value-type="float">
            <text:p>64</text:p>
          </table:table-cell>
          <table:table-cell table:formula="of:=[.Y49]+0" office:value-type="float" office:value="1.15625" calcext:value-type="float">
            <text:p>1.15625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G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.225" calcext:value-type="float">
            <text:p>1.225</text:p>
          </table:table-cell>
          <table:table-cell/>
          <table:table-cell table:formula="of:=[.W50]+0" office:value-type="float" office:value="98" calcext:value-type="float">
            <text:p>98</text:p>
          </table:table-cell>
          <table:table-cell table:formula="of:=[.X50]+0" office:value-type="float" office:value="80" calcext:value-type="float">
            <text:p>80</text:p>
          </table:table-cell>
          <table:table-cell table:formula="of:=[.Y50]+0" office:value-type="float" office:value="1.225" calcext:value-type="float">
            <text:p>1.225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G#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.297297297" calcext:value-type="float">
            <text:p>1.297297297</text:p>
          </table:table-cell>
          <table:table-cell/>
          <table:table-cell table:formula="of:=[.W51]+0" office:value-type="float" office:value="96" calcext:value-type="float">
            <text:p>96</text:p>
          </table:table-cell>
          <table:table-cell table:formula="of:=[.X51]+0" office:value-type="float" office:value="74" calcext:value-type="float">
            <text:p>74</text:p>
          </table:table-cell>
          <table:table-cell table:formula="of:=[.Y51]+0" office:value-type="float" office:value="1.297297297" calcext:value-type="float">
            <text:p>1.297297297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A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.375" calcext:value-type="float">
            <text:p>1.375</text:p>
          </table:table-cell>
          <table:table-cell/>
          <table:table-cell table:formula="of:=[.W52]+0" office:value-type="float" office:value="88" calcext:value-type="float">
            <text:p>88</text:p>
          </table:table-cell>
          <table:table-cell table:formula="of:=[.X52]+0" office:value-type="float" office:value="64" calcext:value-type="float">
            <text:p>64</text:p>
          </table:table-cell>
          <table:table-cell table:formula="of:=[.Y52]+0" office:value-type="float" office:value="1.375" calcext:value-type="float">
            <text:p>1.375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A#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.456521739" calcext:value-type="float">
            <text:p>1.456521739</text:p>
          </table:table-cell>
          <table:table-cell/>
          <table:table-cell table:formula="of:=[.W53]+0" office:value-type="float" office:value="67" calcext:value-type="float">
            <text:p>67</text:p>
          </table:table-cell>
          <table:table-cell table:formula="of:=[.X53]+0" office:value-type="float" office:value="46" calcext:value-type="float">
            <text:p>46</text:p>
          </table:table-cell>
          <table:table-cell table:formula="of:=[.Y53]+0" office:value-type="float" office:value="1.456521739" calcext:value-type="float">
            <text:p>1.456521739</text:p>
          </table:table-cell>
        </table:table-row>
        <table:table-row table:style-name="ro1">
          <table:table-cell table:number-columns-repeated="21"/>
          <table:table-cell table:style-name="ce14" office:value-type="string" calcext:value-type="string">
            <text:p>B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.542857143" calcext:value-type="float">
            <text:p>1.542857143</text:p>
          </table:table-cell>
          <table:table-cell/>
          <table:table-cell table:formula="of:=[.W54]+0" office:value-type="float" office:value="108" calcext:value-type="float">
            <text:p>108</text:p>
          </table:table-cell>
          <table:table-cell table:formula="of:=[.X54]+0" office:value-type="float" office:value="70" calcext:value-type="float">
            <text:p>70</text:p>
          </table:table-cell>
          <table:table-cell table:formula="of:=[.Y54]+0" office:value-type="float" office:value="1.542857143" calcext:value-type="float">
            <text:p>1.542857143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1"/>
          <table:table-cell office:value-type="string" calcext:value-type="string">
            <text:p>Reciprocal control</text:p>
          </table:table-cell>
          <table:table-cell table:number-columns-repeated="4"/>
          <table:table-cell office:value-type="string" calcext:value-type="string">
            <text:p>Pitch bend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string" calcext:value-type="string">
            <text:p>numerator</text:p>
          </table:table-cell>
          <table:table-cell office:value-type="float" office:value="44100" calcext:value-type="float">
            <text:p>44100</text:p>
          </table:table-cell>
          <table:table-cell table:number-columns-repeated="2"/>
          <table:table-cell office:value-type="string" calcext:value-type="string">
            <text:p>max down</text:p>
          </table:table-cell>
          <table:table-cell office:value-type="float" office:value="-8192" calcext:value-type="float">
            <text:p>-8192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centr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2"/>
          <table:table-cell office:value-type="string" calcext:value-type="string">
            <text:p>denominator</text:p>
          </table:table-cell>
          <table:table-cell table:number-columns-repeated="3"/>
          <table:table-cell office:value-type="string" calcext:value-type="string">
            <text:p>max up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V61]" office:value-type="float" office:value="1" calcext:value-type="float">
            <text:p>1</text:p>
          </table:table-cell>
          <table:table-cell table:formula="of:=[.X$58]/[.W61]" office:value-type="float" office:value="44100" calcext:value-type="float">
            <text:p>441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1]+1" office:value-type="float" office:value="2" calcext:value-type="float">
            <text:p>2</text:p>
          </table:table-cell>
          <table:table-cell table:formula="of:=[.V62]" office:value-type="float" office:value="2" calcext:value-type="float">
            <text:p>2</text:p>
          </table:table-cell>
          <table:table-cell table:formula="of:=[.X$58]/[.W62]" office:value-type="float" office:value="22050" calcext:value-type="float">
            <text:p>22050</text:p>
          </table:table-cell>
          <table:table-cell table:number-columns-repeated="2"/>
          <table:table-cell office:value-type="string" calcext:value-type="string">
            <text:p>semiton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1"/>
          <table:table-cell table:formula="of:=[.V62]+1" office:value-type="float" office:value="3" calcext:value-type="float">
            <text:p>3</text:p>
          </table:table-cell>
          <table:table-cell table:formula="of:=[.V63]" office:value-type="float" office:value="3" calcext:value-type="float">
            <text:p>3</text:p>
          </table:table-cell>
          <table:table-cell table:formula="of:=[.X$58]/[.W63]" office:value-type="float" office:value="14700" calcext:value-type="float">
            <text:p>147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table:formula="of:=2^([.AB62]/12)" office:value-type="float" office:value="1.12246204830937" calcext:value-type="float">
            <text:p>1.12246204830937</text:p>
          </table:table-cell>
          <table:table-cell/>
        </table:table-row>
        <table:table-row table:style-name="ro1">
          <table:table-cell table:number-columns-repeated="21"/>
          <table:table-cell table:formula="of:=[.V63]+1" office:value-type="float" office:value="4" calcext:value-type="float">
            <text:p>4</text:p>
          </table:table-cell>
          <table:table-cell table:formula="of:=[.V64]" office:value-type="float" office:value="4" calcext:value-type="float">
            <text:p>4</text:p>
          </table:table-cell>
          <table:table-cell table:formula="of:=[.X$58]/[.W64]" office:value-type="float" office:value="11025" calcext:value-type="float">
            <text:p>1102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4]+1" office:value-type="float" office:value="5" calcext:value-type="float">
            <text:p>5</text:p>
          </table:table-cell>
          <table:table-cell table:formula="of:=[.V65]" office:value-type="float" office:value="5" calcext:value-type="float">
            <text:p>5</text:p>
          </table:table-cell>
          <table:table-cell table:formula="of:=[.X$58]/[.W65]" office:value-type="float" office:value="8820" calcext:value-type="float">
            <text:p>882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5]+1" office:value-type="float" office:value="6" calcext:value-type="float">
            <text:p>6</text:p>
          </table:table-cell>
          <table:table-cell table:formula="of:=[.V66]" office:value-type="float" office:value="6" calcext:value-type="float">
            <text:p>6</text:p>
          </table:table-cell>
          <table:table-cell table:formula="of:=[.X$58]/[.W66]" office:value-type="float" office:value="7350" calcext:value-type="float">
            <text:p>735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6]+1" office:value-type="float" office:value="7" calcext:value-type="float">
            <text:p>7</text:p>
          </table:table-cell>
          <table:table-cell table:formula="of:=[.V67]" office:value-type="float" office:value="7" calcext:value-type="float">
            <text:p>7</text:p>
          </table:table-cell>
          <table:table-cell table:formula="of:=[.X$58]/[.W67]" office:value-type="float" office:value="6300" calcext:value-type="float">
            <text:p>63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7]+1" office:value-type="float" office:value="8" calcext:value-type="float">
            <text:p>8</text:p>
          </table:table-cell>
          <table:table-cell table:formula="of:=[.V68]" office:value-type="float" office:value="8" calcext:value-type="float">
            <text:p>8</text:p>
          </table:table-cell>
          <table:table-cell table:formula="of:=[.X$58]/[.W68]" office:value-type="float" office:value="5512.5" calcext:value-type="float">
            <text:p>5512.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8]+1" office:value-type="float" office:value="9" calcext:value-type="float">
            <text:p>9</text:p>
          </table:table-cell>
          <table:table-cell table:formula="of:=[.V69]" office:value-type="float" office:value="9" calcext:value-type="float">
            <text:p>9</text:p>
          </table:table-cell>
          <table:table-cell table:formula="of:=[.X$58]/[.W69]" office:value-type="float" office:value="4900" calcext:value-type="float">
            <text:p>49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69]+1" office:value-type="float" office:value="10" calcext:value-type="float">
            <text:p>10</text:p>
          </table:table-cell>
          <table:table-cell table:formula="of:=[.V70]" office:value-type="float" office:value="10" calcext:value-type="float">
            <text:p>10</text:p>
          </table:table-cell>
          <table:table-cell table:formula="of:=[.X$58]/[.W70]" office:value-type="float" office:value="4410" calcext:value-type="float">
            <text:p>441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0]+1" office:value-type="float" office:value="11" calcext:value-type="float">
            <text:p>11</text:p>
          </table:table-cell>
          <table:table-cell table:formula="of:=[.V71]" office:value-type="float" office:value="11" calcext:value-type="float">
            <text:p>11</text:p>
          </table:table-cell>
          <table:table-cell table:formula="of:=[.X$58]/[.W71]" office:value-type="float" office:value="4009.09090909091" calcext:value-type="float">
            <text:p>4009.09090909091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1]+1" office:value-type="float" office:value="12" calcext:value-type="float">
            <text:p>12</text:p>
          </table:table-cell>
          <table:table-cell table:formula="of:=[.V72]" office:value-type="float" office:value="12" calcext:value-type="float">
            <text:p>12</text:p>
          </table:table-cell>
          <table:table-cell table:formula="of:=[.X$58]/[.W72]" office:value-type="float" office:value="3675" calcext:value-type="float">
            <text:p>367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2]+1" office:value-type="float" office:value="13" calcext:value-type="float">
            <text:p>13</text:p>
          </table:table-cell>
          <table:table-cell table:formula="of:=[.V73]" office:value-type="float" office:value="13" calcext:value-type="float">
            <text:p>13</text:p>
          </table:table-cell>
          <table:table-cell table:formula="of:=[.X$58]/[.W73]" office:value-type="float" office:value="3392.30769230769" calcext:value-type="float">
            <text:p>3392.30769230769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3]+1" office:value-type="float" office:value="14" calcext:value-type="float">
            <text:p>14</text:p>
          </table:table-cell>
          <table:table-cell table:formula="of:=[.V74]" office:value-type="float" office:value="14" calcext:value-type="float">
            <text:p>14</text:p>
          </table:table-cell>
          <table:table-cell table:formula="of:=[.X$58]/[.W74]" office:value-type="float" office:value="3150" calcext:value-type="float">
            <text:p>315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4]+1" office:value-type="float" office:value="15" calcext:value-type="float">
            <text:p>15</text:p>
          </table:table-cell>
          <table:table-cell table:formula="of:=[.V75]" office:value-type="float" office:value="15" calcext:value-type="float">
            <text:p>15</text:p>
          </table:table-cell>
          <table:table-cell table:formula="of:=[.X$58]/[.W75]" office:value-type="float" office:value="2940" calcext:value-type="float">
            <text:p>294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5]+1" office:value-type="float" office:value="16" calcext:value-type="float">
            <text:p>16</text:p>
          </table:table-cell>
          <table:table-cell table:formula="of:=[.V76]" office:value-type="float" office:value="16" calcext:value-type="float">
            <text:p>16</text:p>
          </table:table-cell>
          <table:table-cell table:formula="of:=[.X$58]/[.W76]" office:value-type="float" office:value="2756.25" calcext:value-type="float">
            <text:p>2756.2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6]+1" office:value-type="float" office:value="17" calcext:value-type="float">
            <text:p>17</text:p>
          </table:table-cell>
          <table:table-cell table:formula="of:=[.V77]" office:value-type="float" office:value="17" calcext:value-type="float">
            <text:p>17</text:p>
          </table:table-cell>
          <table:table-cell table:formula="of:=[.X$58]/[.W77]" office:value-type="float" office:value="2594.11764705882" calcext:value-type="float">
            <text:p>2594.11764705882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7]+1" office:value-type="float" office:value="18" calcext:value-type="float">
            <text:p>18</text:p>
          </table:table-cell>
          <table:table-cell table:formula="of:=[.V78]" office:value-type="float" office:value="18" calcext:value-type="float">
            <text:p>18</text:p>
          </table:table-cell>
          <table:table-cell table:formula="of:=[.X$58]/[.W78]" office:value-type="float" office:value="2450" calcext:value-type="float">
            <text:p>245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8]+1" office:value-type="float" office:value="19" calcext:value-type="float">
            <text:p>19</text:p>
          </table:table-cell>
          <table:table-cell table:formula="of:=[.V79]" office:value-type="float" office:value="19" calcext:value-type="float">
            <text:p>19</text:p>
          </table:table-cell>
          <table:table-cell table:formula="of:=[.X$58]/[.W79]" office:value-type="float" office:value="2321.05263157895" calcext:value-type="float">
            <text:p>2321.0526315789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79]+1" office:value-type="float" office:value="20" calcext:value-type="float">
            <text:p>20</text:p>
          </table:table-cell>
          <table:table-cell table:formula="of:=[.V80]" office:value-type="float" office:value="20" calcext:value-type="float">
            <text:p>20</text:p>
          </table:table-cell>
          <table:table-cell table:formula="of:=[.X$58]/[.W80]" office:value-type="float" office:value="2205" calcext:value-type="float">
            <text:p>220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0]+1" office:value-type="float" office:value="21" calcext:value-type="float">
            <text:p>21</text:p>
          </table:table-cell>
          <table:table-cell table:formula="of:=[.V81]" office:value-type="float" office:value="21" calcext:value-type="float">
            <text:p>21</text:p>
          </table:table-cell>
          <table:table-cell table:formula="of:=[.X$58]/[.W81]"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1]+1" office:value-type="float" office:value="22" calcext:value-type="float">
            <text:p>22</text:p>
          </table:table-cell>
          <table:table-cell table:formula="of:=[.V82]" office:value-type="float" office:value="22" calcext:value-type="float">
            <text:p>22</text:p>
          </table:table-cell>
          <table:table-cell table:formula="of:=[.X$58]/[.W82]" office:value-type="float" office:value="2004.54545454545" calcext:value-type="float">
            <text:p>2004.5454545454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2]+1" office:value-type="float" office:value="23" calcext:value-type="float">
            <text:p>23</text:p>
          </table:table-cell>
          <table:table-cell table:formula="of:=[.V83]" office:value-type="float" office:value="23" calcext:value-type="float">
            <text:p>23</text:p>
          </table:table-cell>
          <table:table-cell table:formula="of:=[.X$58]/[.W83]" office:value-type="float" office:value="1917.39130434783" calcext:value-type="float">
            <text:p>1917.3913043478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3]+1" office:value-type="float" office:value="24" calcext:value-type="float">
            <text:p>24</text:p>
          </table:table-cell>
          <table:table-cell table:formula="of:=[.V84]" office:value-type="float" office:value="24" calcext:value-type="float">
            <text:p>24</text:p>
          </table:table-cell>
          <table:table-cell table:formula="of:=[.X$58]/[.W84]" office:value-type="float" office:value="1837.5" calcext:value-type="float">
            <text:p>1837.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4]+1" office:value-type="float" office:value="25" calcext:value-type="float">
            <text:p>25</text:p>
          </table:table-cell>
          <table:table-cell table:formula="of:=[.V85]" office:value-type="float" office:value="25" calcext:value-type="float">
            <text:p>25</text:p>
          </table:table-cell>
          <table:table-cell table:formula="of:=[.X$58]/[.W85]" office:value-type="float" office:value="1764" calcext:value-type="float">
            <text:p>1764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5]+1" office:value-type="float" office:value="26" calcext:value-type="float">
            <text:p>26</text:p>
          </table:table-cell>
          <table:table-cell table:formula="of:=[.V86]" office:value-type="float" office:value="26" calcext:value-type="float">
            <text:p>26</text:p>
          </table:table-cell>
          <table:table-cell table:formula="of:=[.X$58]/[.W86]" office:value-type="float" office:value="1696.15384615385" calcext:value-type="float">
            <text:p>1696.1538461538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6]+1" office:value-type="float" office:value="27" calcext:value-type="float">
            <text:p>27</text:p>
          </table:table-cell>
          <table:table-cell table:formula="of:=[.V87]" office:value-type="float" office:value="27" calcext:value-type="float">
            <text:p>27</text:p>
          </table:table-cell>
          <table:table-cell table:formula="of:=[.X$58]/[.W87]" office:value-type="float" office:value="1633.33333333333" calcext:value-type="float">
            <text:p>1633.3333333333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7]+1" office:value-type="float" office:value="28" calcext:value-type="float">
            <text:p>28</text:p>
          </table:table-cell>
          <table:table-cell table:formula="of:=[.V88]" office:value-type="float" office:value="28" calcext:value-type="float">
            <text:p>28</text:p>
          </table:table-cell>
          <table:table-cell table:formula="of:=[.X$58]/[.W88]" office:value-type="float" office:value="1575" calcext:value-type="float">
            <text:p>157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8]+1" office:value-type="float" office:value="29" calcext:value-type="float">
            <text:p>29</text:p>
          </table:table-cell>
          <table:table-cell table:formula="of:=[.V89]" office:value-type="float" office:value="29" calcext:value-type="float">
            <text:p>29</text:p>
          </table:table-cell>
          <table:table-cell table:formula="of:=[.X$58]/[.W89]" office:value-type="float" office:value="1520.68965517241" calcext:value-type="float">
            <text:p>1520.68965517241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89]+1" office:value-type="float" office:value="30" calcext:value-type="float">
            <text:p>30</text:p>
          </table:table-cell>
          <table:table-cell table:formula="of:=[.V90]" office:value-type="float" office:value="30" calcext:value-type="float">
            <text:p>30</text:p>
          </table:table-cell>
          <table:table-cell table:formula="of:=[.X$58]/[.W90]"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0]+1" office:value-type="float" office:value="31" calcext:value-type="float">
            <text:p>31</text:p>
          </table:table-cell>
          <table:table-cell table:formula="of:=[.V91]" office:value-type="float" office:value="31" calcext:value-type="float">
            <text:p>31</text:p>
          </table:table-cell>
          <table:table-cell table:formula="of:=[.X$58]/[.W91]" office:value-type="float" office:value="1422.58064516129" calcext:value-type="float">
            <text:p>1422.58064516129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1]+1" office:value-type="float" office:value="32" calcext:value-type="float">
            <text:p>32</text:p>
          </table:table-cell>
          <table:table-cell table:formula="of:=[.V92]" office:value-type="float" office:value="32" calcext:value-type="float">
            <text:p>32</text:p>
          </table:table-cell>
          <table:table-cell table:formula="of:=[.X$58]/[.W92]" office:value-type="float" office:value="1378.125" calcext:value-type="float">
            <text:p>1378.12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2]+1" office:value-type="float" office:value="33" calcext:value-type="float">
            <text:p>33</text:p>
          </table:table-cell>
          <table:table-cell table:formula="of:=[.V93]" office:value-type="float" office:value="33" calcext:value-type="float">
            <text:p>33</text:p>
          </table:table-cell>
          <table:table-cell table:formula="of:=[.X$58]/[.W93]" office:value-type="float" office:value="1336.36363636364" calcext:value-type="float">
            <text:p>1336.36363636364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3]+1" office:value-type="float" office:value="34" calcext:value-type="float">
            <text:p>34</text:p>
          </table:table-cell>
          <table:table-cell table:formula="of:=[.V94]" office:value-type="float" office:value="34" calcext:value-type="float">
            <text:p>34</text:p>
          </table:table-cell>
          <table:table-cell table:formula="of:=[.X$58]/[.W94]" office:value-type="float" office:value="1297.05882352941" calcext:value-type="float">
            <text:p>1297.05882352941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4]+1" office:value-type="float" office:value="35" calcext:value-type="float">
            <text:p>35</text:p>
          </table:table-cell>
          <table:table-cell table:formula="of:=[.V95]" office:value-type="float" office:value="35" calcext:value-type="float">
            <text:p>35</text:p>
          </table:table-cell>
          <table:table-cell table:formula="of:=[.X$58]/[.W95]" office:value-type="float" office:value="1260" calcext:value-type="float">
            <text:p>126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5]+1" office:value-type="float" office:value="36" calcext:value-type="float">
            <text:p>36</text:p>
          </table:table-cell>
          <table:table-cell table:formula="of:=[.V96]" office:value-type="float" office:value="36" calcext:value-type="float">
            <text:p>36</text:p>
          </table:table-cell>
          <table:table-cell table:formula="of:=[.X$58]/[.W96]" office:value-type="float" office:value="1225" calcext:value-type="float">
            <text:p>122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6]+1" office:value-type="float" office:value="37" calcext:value-type="float">
            <text:p>37</text:p>
          </table:table-cell>
          <table:table-cell table:formula="of:=[.V97]" office:value-type="float" office:value="37" calcext:value-type="float">
            <text:p>37</text:p>
          </table:table-cell>
          <table:table-cell table:formula="of:=[.X$58]/[.W97]" office:value-type="float" office:value="1191.89189189189" calcext:value-type="float">
            <text:p>1191.89189189189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7]+1" office:value-type="float" office:value="38" calcext:value-type="float">
            <text:p>38</text:p>
          </table:table-cell>
          <table:table-cell table:formula="of:=[.V98]" office:value-type="float" office:value="38" calcext:value-type="float">
            <text:p>38</text:p>
          </table:table-cell>
          <table:table-cell table:formula="of:=[.X$58]/[.W98]" office:value-type="float" office:value="1160.52631578947" calcext:value-type="float">
            <text:p>1160.52631578947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8]+1" office:value-type="float" office:value="39" calcext:value-type="float">
            <text:p>39</text:p>
          </table:table-cell>
          <table:table-cell table:formula="of:=[.V99]" office:value-type="float" office:value="39" calcext:value-type="float">
            <text:p>39</text:p>
          </table:table-cell>
          <table:table-cell table:formula="of:=[.X$58]/[.W99]" office:value-type="float" office:value="1130.76923076923" calcext:value-type="float">
            <text:p>1130.7692307692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99]+1" office:value-type="float" office:value="40" calcext:value-type="float">
            <text:p>40</text:p>
          </table:table-cell>
          <table:table-cell table:formula="of:=[.V100]" office:value-type="float" office:value="40" calcext:value-type="float">
            <text:p>40</text:p>
          </table:table-cell>
          <table:table-cell table:formula="of:=[.X$58]/[.W100]" office:value-type="float" office:value="1102.5" calcext:value-type="float">
            <text:p>1102.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0]+1" office:value-type="float" office:value="41" calcext:value-type="float">
            <text:p>41</text:p>
          </table:table-cell>
          <table:table-cell table:formula="of:=[.V101]" office:value-type="float" office:value="41" calcext:value-type="float">
            <text:p>41</text:p>
          </table:table-cell>
          <table:table-cell table:formula="of:=[.X$58]/[.W101]" office:value-type="float" office:value="1075.60975609756" calcext:value-type="float">
            <text:p>1075.60975609756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1]+1" office:value-type="float" office:value="42" calcext:value-type="float">
            <text:p>42</text:p>
          </table:table-cell>
          <table:table-cell table:formula="of:=[.V102]" office:value-type="float" office:value="42" calcext:value-type="float">
            <text:p>42</text:p>
          </table:table-cell>
          <table:table-cell table:formula="of:=[.X$58]/[.W102]"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2]+1" office:value-type="float" office:value="43" calcext:value-type="float">
            <text:p>43</text:p>
          </table:table-cell>
          <table:table-cell table:formula="of:=[.V103]" office:value-type="float" office:value="43" calcext:value-type="float">
            <text:p>43</text:p>
          </table:table-cell>
          <table:table-cell table:formula="of:=[.X$58]/[.W103]" office:value-type="float" office:value="1025.58139534884" calcext:value-type="float">
            <text:p>1025.58139534884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3]+1" office:value-type="float" office:value="44" calcext:value-type="float">
            <text:p>44</text:p>
          </table:table-cell>
          <table:table-cell table:formula="of:=[.V104]" office:value-type="float" office:value="44" calcext:value-type="float">
            <text:p>44</text:p>
          </table:table-cell>
          <table:table-cell table:formula="of:=[.X$58]/[.W104]" office:value-type="float" office:value="1002.27272727273" calcext:value-type="float">
            <text:p>1002.2727272727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4]+1" office:value-type="float" office:value="45" calcext:value-type="float">
            <text:p>45</text:p>
          </table:table-cell>
          <table:table-cell table:formula="of:=[.V105]" office:value-type="float" office:value="45" calcext:value-type="float">
            <text:p>45</text:p>
          </table:table-cell>
          <table:table-cell table:formula="of:=[.X$58]/[.W105]"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5]+1" office:value-type="float" office:value="46" calcext:value-type="float">
            <text:p>46</text:p>
          </table:table-cell>
          <table:table-cell table:formula="of:=[.V106]" office:value-type="float" office:value="46" calcext:value-type="float">
            <text:p>46</text:p>
          </table:table-cell>
          <table:table-cell table:formula="of:=[.X$58]/[.W106]" office:value-type="float" office:value="958.695652173913" calcext:value-type="float">
            <text:p>958.695652173913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6]+1" office:value-type="float" office:value="47" calcext:value-type="float">
            <text:p>47</text:p>
          </table:table-cell>
          <table:table-cell table:formula="of:=[.V107]" office:value-type="float" office:value="47" calcext:value-type="float">
            <text:p>47</text:p>
          </table:table-cell>
          <table:table-cell table:formula="of:=[.X$58]/[.W107]" office:value-type="float" office:value="938.297872340426" calcext:value-type="float">
            <text:p>938.297872340426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7]+1" office:value-type="float" office:value="48" calcext:value-type="float">
            <text:p>48</text:p>
          </table:table-cell>
          <table:table-cell table:formula="of:=[.V108]" office:value-type="float" office:value="48" calcext:value-type="float">
            <text:p>48</text:p>
          </table:table-cell>
          <table:table-cell table:formula="of:=[.X$58]/[.W108]" office:value-type="float" office:value="918.75" calcext:value-type="float">
            <text:p>918.75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8]+1" office:value-type="float" office:value="49" calcext:value-type="float">
            <text:p>49</text:p>
          </table:table-cell>
          <table:table-cell table:formula="of:=[.V109]" office:value-type="float" office:value="49" calcext:value-type="float">
            <text:p>49</text:p>
          </table:table-cell>
          <table:table-cell table:formula="of:=[.X$58]/[.W109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109]+1" office:value-type="float" office:value="50" calcext:value-type="float">
            <text:p>50</text:p>
          </table:table-cell>
          <table:table-cell table:formula="of:=[.V110]" office:value-type="float" office:value="50" calcext:value-type="float">
            <text:p>50</text:p>
          </table:table-cell>
          <table:table-cell table:formula="of:=[.X$58]/[.W110]" office:value-type="float" office:value="882" calcext:value-type="float">
            <text:p>882</text:p>
          </table:table-cell>
          <table:table-cell table:number-columns-repeated="5"/>
        </table:table-row>
      </table:table>
      <table:table table:name="Sheet2" table:style-name="ta1">
        <table:table-column table:style-name="co6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5:35:02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9-23T16:00:36.498000000</dc:date>
    <meta:editing-duration>P1DT7H27M39S</meta:editing-duration>
    <meta:editing-cycles>18</meta:editing-cycles>
    <meta:generator>LibreOffice/6.1.5.2$Windows_X86_64 LibreOffice_project/90f8dcf33c87b3705e78202e3df5142b201bd805</meta:generator>
    <meta:document-statistic meta:table-count="2" meta:cell-count="633" meta:object-count="1"/>
  </office:meta>
</office:document-meta>
</file>