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17.43mm"/>
    </style:style>
    <style:style style:name="co4" style:family="table-column">
      <style:table-column-properties fo:break-before="auto" style:column-width="11.43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67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5"/>
    <style:style style:name="ce2" style:family="table-cell" style:parent-style-name="Default" style:data-style-name="N121"/>
    <style:style style:name="ce3" style:family="table-cell" style:parent-style-name="Default" style:data-style-name="N2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[Constructor pop-up]</text:p>
          </table:table-cell>
          <table:table-cell table:number-columns-repeated="4"/>
          <table:table-cell office:value-type="string" calcext:value-type="string">
            <text:p>Colours</text:p>
          </table:table-cell>
          <table:table-cell table:number-columns-repeated="7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x again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ve</text:p>
          </table:table-cell>
          <table:table-cell table:number-columns-repeated="4"/>
          <table:table-cell office:value-type="string" calcext:value-type="string">
            <text:p>0x07FF</text:p>
          </table:table-cell>
          <table:table-cell table:formula="of:=HEX2DEC(MID([.H3];3;999))" office:value-type="float" office:value="2047" calcext:value-type="float">
            <text:p>2047</text:p>
          </table:table-cell>
          <table:table-cell table:formula="of:=BITAND([.I3];63488)/2048*8" office:value-type="float" office:value="0" calcext:value-type="float">
            <text:p>0</text:p>
          </table:table-cell>
          <table:table-cell table:formula="of:=BITAND([.I3];2016)/32*4" office:value-type="float" office:value="252" calcext:value-type="float">
            <text:p>252</text:p>
          </table:table-cell>
          <table:table-cell table:formula="of:=BITAND([.I3];31)*8" office:value-type="float" office:value="248" calcext:value-type="float">
            <text:p>248</text:p>
          </table:table-cell>
          <table:table-cell table:formula="of:=&quot;0x&quot;&amp;DEC2HEX(INT([.J3]/8)*2048+INT([.K3]/4)*32+INT([.L3]/8))" office:value-type="string" office:string-value="0x7FF" calcext:value-type="string">
            <text:p>0x7FF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meters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table:formula="of:=[.J4]" office:value-type="float" office:value="144" calcext:value-type="float">
            <text:p>144</text:p>
          </table:table-cell>
          <table:table-cell table:formula="of:=[.K4]" office:value-type="float" office:value="144" calcext:value-type="float">
            <text:p>144</text:p>
          </table:table-cell>
          <table:table-cell table:formula="of:=&quot;0x&quot;&amp;DEC2HEX(INT([.J4]/8)*2048+INT([.K4]/4)*32+INT([.L4]/8))" office:value-type="string" office:string-value="0x9492" calcext:value-type="string">
            <text:p>0x9492</text:p>
          </table:table-cell>
          <table:table-cell table:number-columns-repeated="2"/>
          <table:table-cell table:formula="of:=LOG([.P3]/[.P2])/LOG([.P1])" office:value-type="float" office:value="10.9657842846621" calcext:value-type="float">
            <text:p>10.9657842846621</text:p>
          </table:table-cell>
        </table:table-row>
        <table:table-row table:style-name="ro1">
          <table:table-cell table:number-columns-repeated="7"/>
          <table:table-cell table:formula="of:=[.M4]" office:value-type="string" office:string-value="0x9492" calcext:value-type="string">
            <text:p>0x9492</text:p>
          </table:table-cell>
          <table:table-cell table:formula="of:=HEX2DEC(MID([.H5];3;999))" office:value-type="float" office:value="38034" calcext:value-type="float">
            <text:p>38034</text:p>
          </table:table-cell>
          <table:table-cell table:formula="of:=BITAND([.I5];63488)/2048*8" office:value-type="float" office:value="144" calcext:value-type="float">
            <text:p>144</text:p>
          </table:table-cell>
          <table:table-cell table:formula="of:=BITAND([.I5];2016)/32*4" office:value-type="float" office:value="144" calcext:value-type="float">
            <text:p>144</text:p>
          </table:table-cell>
          <table:table-cell table:formula="of:=BITAND([.I5];31)*8" office:value-type="float" office:value="144" calcext:value-type="float">
            <text:p>144</text:p>
          </table:table-cell>
          <table:table-cell table:formula="of:=&quot;0x&quot;&amp;DEC2HEX(INT([.J5]/8)*2048+INT([.K5]/4)*32+INT([.L5]/8))" office:value-type="string" office:string-value="0x9492" calcext:value-type="string">
            <text:p>0x9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nection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elect output</text:p>
          </table:table-cell>
          <table:table-cell table:number-columns-repeated="4"/>
          <table:table-cell office:value-type="string" calcext:value-type="string">
            <text:p>0x7BEF</text:p>
          </table:table-cell>
          <table:table-cell table:formula="of:=HEX2DEC(MID([.H6];3;999))" office:value-type="float" office:value="31727" calcext:value-type="float">
            <text:p>31727</text:p>
          </table:table-cell>
          <table:table-cell table:formula="of:=BITAND([.I6];63488)/2048*8" office:value-type="float" office:value="120" calcext:value-type="float">
            <text:p>120</text:p>
          </table:table-cell>
          <table:table-cell table:formula="of:=BITAND([.I6];2016)/32*4" office:value-type="float" office:value="124" calcext:value-type="float">
            <text:p>124</text:p>
          </table:table-cell>
          <table:table-cell table:formula="of:=BITAND([.I6];31)*8" office:value-type="float" office:value="120" calcext:value-type="float">
            <text:p>120</text:p>
          </table:table-cell>
          <table:table-cell table:formula="of:=&quot;0x&quot;&amp;DEC2HEX(INT([.J6]/8)*2048+INT([.K6]/4)*32+INT([.L6]/8))" office:value-type="string" office:string-value="0x7BEF" calcext:value-type="string">
            <text:p>0x7BE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lect input</text:p>
          </table:table-cell>
          <table:table-cell table:number-columns-repeated="6"/>
          <table:table-cell table:number-columns-repeated="3" office:value-type="float" office:value="160" calcext:value-type="float">
            <text:p>160</text:p>
          </table:table-cell>
          <table:table-cell table:formula="of:=&quot;0x&quot;&amp;DEC2HEX(INT([.J7]/8)*2048+INT([.K7]/4)*32+INT([.L7]/8))" office:value-type="string" office:string-value="0xA514" calcext:value-type="string">
            <text:p>0xA51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[.P$1]^([.O7]*[.P$4]/130)*[.P$2]" office:value-type="float" office:value="5" calcext:value-type="float">
            <text:p>5.00</text:p>
          </table:table-cell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table:formula="of:=[.M7]" office:value-type="string" office:string-value="0xA514" calcext:value-type="string">
            <text:p>0xA514</text:p>
          </table:table-cell>
          <table:table-cell table:formula="of:=HEX2DEC(MID([.H8];3;999))" office:value-type="float" office:value="42260" calcext:value-type="float">
            <text:p>42260</text:p>
          </table:table-cell>
          <table:table-cell table:formula="of:=BITAND([.I8];63488)/2048*8" office:value-type="float" office:value="160" calcext:value-type="float">
            <text:p>160</text:p>
          </table:table-cell>
          <table:table-cell table:formula="of:=BITAND([.I8];2016)/32*4" office:value-type="float" office:value="160" calcext:value-type="float">
            <text:p>160</text:p>
          </table:table-cell>
          <table:table-cell table:formula="of:=BITAND([.I8];31)*8" office:value-type="float" office:value="160" calcext:value-type="float">
            <text:p>160</text:p>
          </table:table-cell>
          <table:table-cell table:formula="of:=&quot;0x&quot;&amp;DEC2HEX(INT([.J8]/8)*2048+INT([.K8]/4)*32+INT([.L8]/8))" office:value-type="string" office:string-value="0xA514" calcext:value-type="string">
            <text:p>0xA514</text:p>
          </table:table-cell>
          <table:table-cell/>
          <table:table-cell table:formula="of:=[.O7]+10" office:value-type="float" office:value="10" calcext:value-type="float">
            <text:p>10</text:p>
          </table:table-cell>
          <table:table-cell table:style-name="ce3" table:formula="of:=[.P$1]^([.O8]*[.P$4]/130)*[.P$2]" office:value-type="float" office:value="8.97212650928862" calcext:value-type="float">
            <text:p>8.97</text:p>
          </table:table-cell>
        </table:table-row>
        <table:table-row table:style-name="ro1">
          <table:table-cell table:number-columns-repeated="14"/>
          <table:table-cell table:formula="of:=[.O8]+10" office:value-type="float" office:value="20" calcext:value-type="float">
            <text:p>20</text:p>
          </table:table-cell>
          <table:table-cell table:style-name="ce3" table:formula="of:=[.P$1]^([.O9]*[.P$4]/130)*[.P$2]" office:value-type="float" office:value="16.0998108197359" calcext:value-type="float">
            <text:p>16.10</text:p>
          </table:table-cell>
        </table:table-row>
        <table:table-row table:style-name="ro1">
          <table:table-cell table:number-columns-repeated="14"/>
          <table:table-cell table:formula="of:=[.O9]+10" office:value-type="float" office:value="30" calcext:value-type="float">
            <text:p>30</text:p>
          </table:table-cell>
          <table:table-cell table:style-name="ce3" table:formula="of:=[.P$1]^([.O10]*[.P$4]/130)*[.P$2]" office:value-type="float" office:value="28.8899078900569" calcext:value-type="float">
            <text:p>28.89</text:p>
          </table:table-cell>
        </table:table-row>
        <table:table-row table:style-name="ro1">
          <table:table-cell table:number-columns-repeated="14"/>
          <table:table-cell table:formula="of:=[.O10]+10" office:value-type="float" office:value="40" calcext:value-type="float">
            <text:p>40</text:p>
          </table:table-cell>
          <table:table-cell table:style-name="ce3" table:formula="of:=[.P$1]^([.O11]*[.P$4]/130)*[.P$2]" office:value-type="float" office:value="51.8407816862572" calcext:value-type="float">
            <text:p>51.84</text:p>
          </table:table-cell>
        </table:table-row>
        <table:table-row table:style-name="ro1">
          <table:table-cell table:number-columns-repeated="14"/>
          <table:table-cell table:formula="of:=[.O11]+10" office:value-type="float" office:value="50" calcext:value-type="float">
            <text:p>50</text:p>
          </table:table-cell>
          <table:table-cell table:style-name="ce3" table:formula="of:=[.P$1]^([.O12]*[.P$4]/130)*[.P$2]" office:value-type="float" office:value="93.0244103259025" calcext:value-type="float">
            <text:p>93.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eq [Hz]</text:p>
          </table:table-cell>
          <table:table-cell office:value-type="string" calcext:value-type="string">
            <text:p>log2(freq)</text:p>
          </table:table-cell>
          <table:table-cell table:number-columns-repeated="8"/>
          <table:table-cell table:formula="of:=[.O12]+10" office:value-type="float" office:value="60" calcext:value-type="float">
            <text:p>60</text:p>
          </table:table-cell>
          <table:table-cell table:style-name="ce3" table:formula="of:=[.P$1]^([.O13]*[.P$4]/130)*[.P$2]" office:value-type="float" office:value="166.925355579194" calcext:value-type="float">
            <text:p>166.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float" office:value="220" calcext:value-type="float">
            <text:p>220</text:p>
          </table:table-cell>
          <table:table-cell table:style-name="ce1" table:formula="of:=LOG([.E14])/LOG(2)" office:value-type="float" office:value="7.78135971352466" calcext:value-type="float">
            <text:p>7.781359714</text:p>
          </table:table-cell>
          <table:table-cell table:formula="of:=[.F14]-INT([.F14])-1" office:value-type="float" office:value="-0.21864028647534" calcext:value-type="float">
            <text:p>-0.21864028647534</text:p>
          </table:table-cell>
          <table:table-cell table:number-columns-repeated="7"/>
          <table:table-cell table:formula="of:=[.O13]+10" office:value-type="float" office:value="70" calcext:value-type="float">
            <text:p>70</text:p>
          </table:table-cell>
          <table:table-cell table:style-name="ce3" table:formula="of:=[.P$1]^([.O14]*[.P$4]/130)*[.P$2]" office:value-type="float" office:value="299.535081572904" calcext:value-type="float">
            <text:p>299.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8</text:p>
          </table:table-cell>
          <table:table-cell table:formula="of:=[.E14]*16" office:value-type="float" office:value="3520" calcext:value-type="float">
            <text:p>3520</text:p>
          </table:table-cell>
          <table:table-cell table:style-name="ce2" table:formula="of:=LOG([.E15])/LOG(2)" office:value-type="float" office:value="11.7813597135247" calcext:value-type="float">
            <text:p>11.781</text:p>
          </table:table-cell>
          <table:table-cell table:number-columns-repeated="8"/>
          <table:table-cell table:formula="of:=[.O14]+10" office:value-type="float" office:value="80" calcext:value-type="float">
            <text:p>80</text:p>
          </table:table-cell>
          <table:table-cell table:style-name="ce3" table:formula="of:=[.P$1]^([.O15]*[.P$4]/130)*[.P$2]" office:value-type="float" office:value="537.493329168436" calcext:value-type="float">
            <text:p>537.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0</text:p>
          </table:table-cell>
          <table:table-cell table:formula="of:=[.E14]/16" office:value-type="float" office:value="13.75" calcext:value-type="float">
            <text:p>13.75</text:p>
          </table:table-cell>
          <table:table-cell table:style-name="ce2" table:formula="of:=LOG([.E16])/LOG(2)" office:value-type="float" office:value="3.78135971352466" calcext:value-type="float">
            <text:p>3.781</text:p>
          </table:table-cell>
          <table:table-cell table:number-columns-repeated="8"/>
          <table:table-cell table:formula="of:=[.O15]+10" office:value-type="float" office:value="90" calcext:value-type="float">
            <text:p>90</text:p>
          </table:table-cell>
          <table:table-cell table:style-name="ce3" table:formula="of:=[.P$1]^([.O16]*[.P$4]/130)*[.P$2]" office:value-type="float" office:value="964.491629439585" calcext:value-type="float">
            <text:p>964.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-4</text:p>
          </table:table-cell>
          <table:table-cell table:formula="of:=[.E16]/16" office:value-type="float" office:value="0.859375" calcext:value-type="float">
            <text:p>0.859375</text:p>
          </table:table-cell>
          <table:table-cell table:style-name="ce2" table:formula="of:=LOG([.E17])/LOG(2)" office:value-type="float" office:value="-0.21864028647534" calcext:value-type="float">
            <text:p>-0.219</text:p>
          </table:table-cell>
          <table:table-cell table:number-columns-repeated="8"/>
          <table:table-cell table:formula="of:=[.O16]+10" office:value-type="float" office:value="100" calcext:value-type="float">
            <text:p>100</text:p>
          </table:table-cell>
          <table:table-cell table:style-name="ce3" table:formula="of:=[.P$1]^([.O17]*[.P$4]/130)*[.P$2]" office:value-type="float" office:value="1730.70818329638" calcext:value-type="float">
            <text:p>1730.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-8</text:p>
          </table:table-cell>
          <table:table-cell table:formula="of:=[.E17]/16" office:value-type="float" office:value="0.0537109375" calcext:value-type="float">
            <text:p>0.0537109375</text:p>
          </table:table-cell>
          <table:table-cell table:style-name="ce2" table:formula="of:=LOG([.E18])/LOG(2)" office:value-type="float" office:value="-4.21864028647534" calcext:value-type="float">
            <text:p>-4.219</text:p>
          </table:table-cell>
          <table:table-cell table:number-columns-repeated="8"/>
          <table:table-cell table:formula="of:=[.O17]+10" office:value-type="float" office:value="110" calcext:value-type="float">
            <text:p>110</text:p>
          </table:table-cell>
          <table:table-cell table:style-name="ce3" table:formula="of:=[.P$1]^([.O18]*[.P$4]/130)*[.P$2]" office:value-type="float" office:value="3105.62655423923" calcext:value-type="float">
            <text:p>3105.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9</text:p>
          </table:table-cell>
          <table:table-cell table:formula="of:=[.E15]*2" office:value-type="float" office:value="7040" calcext:value-type="float">
            <text:p>7040</text:p>
          </table:table-cell>
          <table:table-cell table:style-name="ce2" table:formula="of:=LOG([.E19])/LOG(2)" office:value-type="float" office:value="12.7813597135247" calcext:value-type="float">
            <text:p>12.781</text:p>
          </table:table-cell>
          <table:table-cell table:number-columns-repeated="8"/>
          <table:table-cell table:formula="of:=[.O18]+10" office:value-type="float" office:value="120" calcext:value-type="float">
            <text:p>120</text:p>
          </table:table-cell>
          <table:table-cell table:style-name="ce3" table:formula="of:=[.P$1]^([.O19]*[.P$4]/130)*[.P$2]" office:value-type="float" office:value="5572.8148670481" calcext:value-type="float">
            <text:p>5572.81</text:p>
          </table:table-cell>
        </table:table-row>
        <table:table-row table:style-name="ro1">
          <table:table-cell table:number-columns-repeated="14"/>
          <table:table-cell table:formula="of:=[.O19]+10" office:value-type="float" office:value="130" calcext:value-type="float">
            <text:p>130</text:p>
          </table:table-cell>
          <table:table-cell table:style-name="ce3" table:formula="of:=[.P$1]^([.O20]*[.P$4]/130)*[.P$2]" office:value-type="float" office:value="10000" calcext:value-type="float">
            <text:p>10000.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t pot to ±1, encoder to -3 - +12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table:style-name="ce1" table:formula="of:=[.F14]" office:value-type="float" office:value="7.78135971352466" calcext:value-type="float">
            <text:p>7.781359714</text:p>
          </table:table-cell>
          <table:table-cell table:formula="of:=2^[.F24]"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[.F24]-1/2048" office:value-type="float" office:value="7.78087143227466" calcext:value-type="float">
            <text:p>7.78087143227466</text:p>
          </table:table-cell>
          <table:table-cell table:style-name="ce3" table:formula="of:=2^[.F25]" office:value-type="float" office:value="219.925553429174" calcext:value-type="float">
            <text:p>219.93</text:p>
          </table:table-cell>
          <table:table-cell table:number-columns-repeated="7"/>
          <table:table-cell office:value-type="float" office:value="800" calcext:value-type="float">
            <text:p>800</text:p>
          </table:table-cell>
          <table:table-cell table:formula="of:=LOG([.O25])/LOG(2)" office:value-type="float" office:value="9.64385618977473" calcext:value-type="float">
            <text:p>9.64385618977473</text:p>
          </table:table-cell>
        </table:table-row>
        <table:table-row table:style-name="ro1">
          <table:table-cell table:number-columns-repeated="5"/>
          <table:table-cell table:formula="of:=[.F25]-1/2048" office:value-type="float" office:value="7.78038315102466" calcext:value-type="float">
            <text:p>7.78038315102466</text:p>
          </table:table-cell>
          <table:table-cell table:style-name="ce3" table:formula="of:=2^[.F26]" office:value-type="float" office:value="219.851132050583" calcext:value-type="float">
            <text:p>219.85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ctrl / enc setting: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freq</text:p>
          </table:table-cell>
          <table:table-cell office:value-type="float" office:value="272.52" calcext:value-type="float">
            <text:p>272.52</text:p>
          </table:table-cell>
          <table:table-cell office:value-type="string" calcext:value-type="string">
            <text:p>Hz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g2(freq)</text:p>
          </table:table-cell>
          <table:table-cell table:formula="of:=LOG([.E29])/LOG(2)" office:value-type="float" office:value="8.09021830165332" calcext:value-type="float">
            <text:p>8.090218301653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OG_NOTE_A</text:p>
          </table:table-cell>
          <table:table-cell table:formula="of:=[.F14]-INT([.F14])" office:value-type="float" office:value="0.78135971352466" calcext:value-type="float">
            <text:p>0.7813597135246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prt</text:p>
          </table:table-cell>
          <table:table-cell table:formula="of:=FLOOR([.E30]-[.E31])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frac</text:p>
          </table:table-cell>
          <table:table-cell table:formula="of:=[.E30]-[.E32]-[.E31]" office:value-type="float" office:value="0.308858588128661" calcext:value-type="float">
            <text:p>0.30885858812866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enc value</text:p>
          </table:table-cell>
          <table:table-cell table:formula="of:=IF([.E33]&gt;0.5;1;0)+[.E32]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ew frac</text:p>
          </table:table-cell>
          <table:table-cell table:formula="of:=IF([.E33]&gt;0.5;[.E33]-1;[.E33])" office:value-type="float" office:value="0.308858588128661" calcext:value-type="float">
            <text:p>0.30885858812866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esult</text:p>
          </table:table-cell>
          <table:table-cell table:formula="of:=[.E34]+[.E35]+[.E31]" office:value-type="float" office:value="8.09021830165332" calcext:value-type="float">
            <text:p>8.090218301653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freq</text:p>
          </table:table-cell>
          <table:table-cell table:formula="of:=2^[.E36]" office:value-type="float" office:value="272.52" calcext:value-type="float">
            <text:p>272.52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table:formula="of:=7+0.000493+[.E31]" office:value-type="float" office:value="7.78185271352466" calcext:value-type="float">
            <text:p>7.78185271352466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2^[.E39]" office:value-type="float" office:value="220.075191589765" calcext:value-type="float">
            <text:p>220.075191589765</text:p>
          </table:table-cell>
          <table:table-cell table:number-columns-repeated="11"/>
        </table:table-row>
      </table:table>
      <table:table table:name="Sheet2" table:style-name="ta1">
        <table:table-column table:style-name="co6" table:default-cell-style-name="ce4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SGTL5000 lineInLev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 0.24 Volts p-p </text:p>
          </table:table-cell>
          <table:table-cell table:formula="of:=MID([.A2];5;4)" office:value-type="string" office:string-value="0.24" calcext:value-type="string">
            <text:p>0.24</text:p>
          </table:table-cell>
          <table:table-cell table:formula="of:=VALUE(LEFT([.A2];2))" office:value-type="float" office:value="15" calcext:value-type="float">
            <text:p>15</text:p>
          </table:table-cell>
          <table:table-cell/>
          <table:table-cell table:formula="of:=&quot;{&quot;&quot;&quot;&amp;[.B2]&amp;&quot;&quot;&quot;, &quot;&amp;[.C2]&amp;&quot;},&quot;" office:value-type="string" office:string-value="{&quot;0.24&quot;, 15}," calcext:value-type="string">
            <text:p>{"0.24", 15},</text:p>
          </table:table-cell>
        </table:table-row>
        <table:table-row table:style-name="ro1">
          <table:table-cell office:value-type="string" calcext:value-type="string">
            <text:p>14: 0.29 Volts p-p</text:p>
          </table:table-cell>
          <table:table-cell table:formula="of:=MID([.A3];5;4)" office:value-type="string" office:string-value="0.29" calcext:value-type="string">
            <text:p>0.29</text:p>
          </table:table-cell>
          <table:table-cell table:formula="of:=VALUE(LEFT([.A3];2))" office:value-type="float" office:value="14" calcext:value-type="float">
            <text:p>14</text:p>
          </table:table-cell>
          <table:table-cell/>
          <table:table-cell table:formula="of:=&quot;{&quot;&quot;&quot;&amp;[.B3]&amp;&quot;&quot;&quot;, &quot;&amp;[.C3]&amp;&quot;},&quot;" office:value-type="string" office:string-value="{&quot;0.29&quot;, 14}," calcext:value-type="string">
            <text:p>{"0.29", 14},</text:p>
          </table:table-cell>
        </table:table-row>
        <table:table-row table:style-name="ro1">
          <table:table-cell office:value-type="string" calcext:value-type="string">
            <text:p>13: 0.34 Volts p-p</text:p>
          </table:table-cell>
          <table:table-cell table:formula="of:=MID([.A4];5;4)" office:value-type="string" office:string-value="0.34" calcext:value-type="string">
            <text:p>0.34</text:p>
          </table:table-cell>
          <table:table-cell table:formula="of:=VALUE(LEFT([.A4];2))" office:value-type="float" office:value="13" calcext:value-type="float">
            <text:p>13</text:p>
          </table:table-cell>
          <table:table-cell/>
          <table:table-cell table:formula="of:=&quot;{&quot;&quot;&quot;&amp;[.B4]&amp;&quot;&quot;&quot;, &quot;&amp;[.C4]&amp;&quot;},&quot;" office:value-type="string" office:string-value="{&quot;0.34&quot;, 13}," calcext:value-type="string">
            <text:p>{"0.34", 13},</text:p>
          </table:table-cell>
        </table:table-row>
        <table:table-row table:style-name="ro1">
          <table:table-cell office:value-type="string" calcext:value-type="string">
            <text:p>12: 0.40 Volts p-p</text:p>
          </table:table-cell>
          <table:table-cell table:formula="of:=MID([.A5];5;4)" office:value-type="string" office:string-value="0.40" calcext:value-type="string">
            <text:p>0.40</text:p>
          </table:table-cell>
          <table:table-cell table:formula="of:=VALUE(LEFT([.A5];2))" office:value-type="float" office:value="12" calcext:value-type="float">
            <text:p>12</text:p>
          </table:table-cell>
          <table:table-cell/>
          <table:table-cell table:formula="of:=&quot;{&quot;&quot;&quot;&amp;[.B5]&amp;&quot;&quot;&quot;, &quot;&amp;[.C5]&amp;&quot;},&quot;" office:value-type="string" office:string-value="{&quot;0.40&quot;, 12}," calcext:value-type="string">
            <text:p>{"0.40", 12},</text:p>
          </table:table-cell>
        </table:table-row>
        <table:table-row table:style-name="ro1">
          <table:table-cell office:value-type="string" calcext:value-type="string">
            <text:p>11: 0.48 Volts p-p</text:p>
          </table:table-cell>
          <table:table-cell table:formula="of:=MID([.A6];5;4)" office:value-type="string" office:string-value="0.48" calcext:value-type="string">
            <text:p>0.48</text:p>
          </table:table-cell>
          <table:table-cell table:formula="of:=VALUE(LEFT([.A6];2))" office:value-type="float" office:value="11" calcext:value-type="float">
            <text:p>11</text:p>
          </table:table-cell>
          <table:table-cell/>
          <table:table-cell table:formula="of:=&quot;{&quot;&quot;&quot;&amp;[.B6]&amp;&quot;&quot;&quot;, &quot;&amp;[.C6]&amp;&quot;},&quot;" office:value-type="string" office:string-value="{&quot;0.48&quot;, 11}," calcext:value-type="string">
            <text:p>{"0.48", 11},</text:p>
          </table:table-cell>
        </table:table-row>
        <table:table-row table:style-name="ro1">
          <table:table-cell office:value-type="string" calcext:value-type="string">
            <text:p>10: 0.56 Volts p-p</text:p>
          </table:table-cell>
          <table:table-cell table:formula="of:=MID([.A7];5;4)" office:value-type="string" office:string-value="0.56" calcext:value-type="string">
            <text:p>0.56</text:p>
          </table:table-cell>
          <table:table-cell table:formula="of:=VALUE(LEFT([.A7];2))" office:value-type="float" office:value="10" calcext:value-type="float">
            <text:p>10</text:p>
          </table:table-cell>
          <table:table-cell/>
          <table:table-cell table:formula="of:=&quot;{&quot;&quot;&quot;&amp;[.B7]&amp;&quot;&quot;&quot;, &quot;&amp;[.C7]&amp;&quot;},&quot;" office:value-type="string" office:string-value="{&quot;0.56&quot;, 10}," calcext:value-type="string">
            <text:p>{"0.56", 10},</text:p>
          </table:table-cell>
        </table:table-row>
        <table:table-row table:style-name="ro1">
          <table:table-cell office:value-type="string" calcext:value-type="string">
            <text:p><text:s/>9: 0.67 Volts p-p</text:p>
          </table:table-cell>
          <table:table-cell table:formula="of:=MID([.A8];5;4)" office:value-type="string" office:string-value="0.67" calcext:value-type="string">
            <text:p>0.67</text:p>
          </table:table-cell>
          <table:table-cell table:formula="of:=VALUE(LEFT([.A8];2))" office:value-type="float" office:value="9" calcext:value-type="float">
            <text:p>9</text:p>
          </table:table-cell>
          <table:table-cell/>
          <table:table-cell table:formula="of:=&quot;{&quot;&quot;&quot;&amp;[.B8]&amp;&quot;&quot;&quot;, &quot;&amp;[.C8]&amp;&quot;},&quot;" office:value-type="string" office:string-value="{&quot;0.67&quot;, 9}," calcext:value-type="string">
            <text:p>{"0.67", 9},</text:p>
          </table:table-cell>
        </table:table-row>
        <table:table-row table:style-name="ro1">
          <table:table-cell office:value-type="string" calcext:value-type="string">
            <text:p><text:s/>8: 0.79 Volts p-p</text:p>
          </table:table-cell>
          <table:table-cell table:formula="of:=MID([.A9];5;4)" office:value-type="string" office:string-value="0.79" calcext:value-type="string">
            <text:p>0.79</text:p>
          </table:table-cell>
          <table:table-cell table:formula="of:=VALUE(LEFT([.A9];2))" office:value-type="float" office:value="8" calcext:value-type="float">
            <text:p>8</text:p>
          </table:table-cell>
          <table:table-cell/>
          <table:table-cell table:formula="of:=&quot;{&quot;&quot;&quot;&amp;[.B9]&amp;&quot;&quot;&quot;, &quot;&amp;[.C9]&amp;&quot;},&quot;" office:value-type="string" office:string-value="{&quot;0.79&quot;, 8}," calcext:value-type="string">
            <text:p>{"0.79", 8},</text:p>
          </table:table-cell>
        </table:table-row>
        <table:table-row table:style-name="ro1">
          <table:table-cell office:value-type="string" calcext:value-type="string">
            <text:p><text:s/>7: 0.94 Volts p-p</text:p>
          </table:table-cell>
          <table:table-cell table:formula="of:=MID([.A10];5;4)" office:value-type="string" office:string-value="0.94" calcext:value-type="string">
            <text:p>0.94</text:p>
          </table:table-cell>
          <table:table-cell table:formula="of:=VALUE(LEFT([.A10];2))" office:value-type="float" office:value="7" calcext:value-type="float">
            <text:p>7</text:p>
          </table:table-cell>
          <table:table-cell/>
          <table:table-cell table:formula="of:=&quot;{&quot;&quot;&quot;&amp;[.B10]&amp;&quot;&quot;&quot;, &quot;&amp;[.C10]&amp;&quot;},&quot;" office:value-type="string" office:string-value="{&quot;0.94&quot;, 7}," calcext:value-type="string">
            <text:p>{"0.94", 7},</text:p>
          </table:table-cell>
        </table:table-row>
        <table:table-row table:style-name="ro1">
          <table:table-cell office:value-type="string" calcext:value-type="string">
            <text:p><text:s/>6: 1.11 Volts p-p</text:p>
          </table:table-cell>
          <table:table-cell table:formula="of:=MID([.A11];5;4)" office:value-type="string" office:string-value="1.11" calcext:value-type="string">
            <text:p>1.11</text:p>
          </table:table-cell>
          <table:table-cell table:formula="of:=VALUE(LEFT([.A11];2))" office:value-type="float" office:value="6" calcext:value-type="float">
            <text:p>6</text:p>
          </table:table-cell>
          <table:table-cell/>
          <table:table-cell table:formula="of:=&quot;{&quot;&quot;&quot;&amp;[.B11]&amp;&quot;&quot;&quot;, &quot;&amp;[.C11]&amp;&quot;},&quot;" office:value-type="string" office:string-value="{&quot;1.11&quot;, 6}," calcext:value-type="string">
            <text:p>{"1.11", 6},</text:p>
          </table:table-cell>
        </table:table-row>
        <table:table-row table:style-name="ro1">
          <table:table-cell office:value-type="string" calcext:value-type="string">
            <text:p><text:s/>5: 1.33 Volts p-p <text:s/>(default)</text:p>
          </table:table-cell>
          <table:table-cell table:formula="of:=MID([.A12];5;4)" office:value-type="string" office:string-value="1.33" calcext:value-type="string">
            <text:p>1.33</text:p>
          </table:table-cell>
          <table:table-cell table:formula="of:=VALUE(LEFT([.A12];2))" office:value-type="float" office:value="5" calcext:value-type="float">
            <text:p>5</text:p>
          </table:table-cell>
          <table:table-cell/>
          <table:table-cell table:formula="of:=&quot;{&quot;&quot;&quot;&amp;[.B12]&amp;&quot;&quot;&quot;, &quot;&amp;[.C12]&amp;&quot;},&quot;" office:value-type="string" office:string-value="{&quot;1.33&quot;, 5}," calcext:value-type="string">
            <text:p>{"1.33", 5},</text:p>
          </table:table-cell>
        </table:table-row>
        <table:table-row table:style-name="ro1">
          <table:table-cell office:value-type="string" calcext:value-type="string">
            <text:p><text:s/>4: 1.58 Volts p-p</text:p>
          </table:table-cell>
          <table:table-cell table:formula="of:=MID([.A13];5;4)" office:value-type="string" office:string-value="1.58" calcext:value-type="string">
            <text:p>1.58</text:p>
          </table:table-cell>
          <table:table-cell table:formula="of:=VALUE(LEFT([.A13];2))" office:value-type="float" office:value="4" calcext:value-type="float">
            <text:p>4</text:p>
          </table:table-cell>
          <table:table-cell/>
          <table:table-cell table:formula="of:=&quot;{&quot;&quot;&quot;&amp;[.B13]&amp;&quot;&quot;&quot;, &quot;&amp;[.C13]&amp;&quot;},&quot;" office:value-type="string" office:string-value="{&quot;1.58&quot;, 4}," calcext:value-type="string">
            <text:p>{"1.58", 4},</text:p>
          </table:table-cell>
        </table:table-row>
        <table:table-row table:style-name="ro1">
          <table:table-cell office:value-type="string" calcext:value-type="string">
            <text:p><text:s/>3: 1.87 Volts p-p</text:p>
          </table:table-cell>
          <table:table-cell table:formula="of:=MID([.A14];5;4)" office:value-type="string" office:string-value="1.87" calcext:value-type="string">
            <text:p>1.87</text:p>
          </table:table-cell>
          <table:table-cell table:formula="of:=VALUE(LEFT([.A14];2))" office:value-type="float" office:value="3" calcext:value-type="float">
            <text:p>3</text:p>
          </table:table-cell>
          <table:table-cell/>
          <table:table-cell table:formula="of:=&quot;{&quot;&quot;&quot;&amp;[.B14]&amp;&quot;&quot;&quot;, &quot;&amp;[.C14]&amp;&quot;},&quot;" office:value-type="string" office:string-value="{&quot;1.87&quot;, 3}," calcext:value-type="string">
            <text:p>{"1.87", 3},</text:p>
          </table:table-cell>
        </table:table-row>
        <table:table-row table:style-name="ro1">
          <table:table-cell office:value-type="string" calcext:value-type="string">
            <text:p><text:s/>2: 2.22 Volts p-p</text:p>
          </table:table-cell>
          <table:table-cell table:formula="of:=MID([.A15];5;4)" office:value-type="string" office:string-value="2.22" calcext:value-type="string">
            <text:p>2.22</text:p>
          </table:table-cell>
          <table:table-cell table:formula="of:=VALUE(LEFT([.A15];2))" office:value-type="float" office:value="2" calcext:value-type="float">
            <text:p>2</text:p>
          </table:table-cell>
          <table:table-cell/>
          <table:table-cell table:formula="of:=&quot;{&quot;&quot;&quot;&amp;[.B15]&amp;&quot;&quot;&quot;, &quot;&amp;[.C15]&amp;&quot;},&quot;" office:value-type="string" office:string-value="{&quot;2.22&quot;, 2}," calcext:value-type="string">
            <text:p>{"2.22", 2},</text:p>
          </table:table-cell>
        </table:table-row>
        <table:table-row table:style-name="ro1">
          <table:table-cell office:value-type="string" calcext:value-type="string">
            <text:p><text:s/>1: 2.63 Volts p-p</text:p>
          </table:table-cell>
          <table:table-cell table:formula="of:=MID([.A16];5;4)" office:value-type="string" office:string-value="2.63" calcext:value-type="string">
            <text:p>2.63</text:p>
          </table:table-cell>
          <table:table-cell table:formula="of:=VALUE(LEFT([.A16];2))" office:value-type="float" office:value="1" calcext:value-type="float">
            <text:p>1</text:p>
          </table:table-cell>
          <table:table-cell/>
          <table:table-cell table:formula="of:=&quot;{&quot;&quot;&quot;&amp;[.B16]&amp;&quot;&quot;&quot;, &quot;&amp;[.C16]&amp;&quot;},&quot;" office:value-type="string" office:string-value="{&quot;2.63&quot;, 1}," calcext:value-type="string">
            <text:p>{"2.63", 1},</text:p>
          </table:table-cell>
        </table:table-row>
        <table:table-row table:style-name="ro1">
          <table:table-cell office:value-type="string" calcext:value-type="string">
            <text:p><text:s/>0: 3.12 Volts p-p</text:p>
          </table:table-cell>
          <table:table-cell table:formula="of:=MID([.A17];5;4)" office:value-type="string" office:string-value="3.12" calcext:value-type="string">
            <text:p>3.12</text:p>
          </table:table-cell>
          <table:table-cell table:formula="of:=VALUE(LEFT([.A17];2))" office:value-type="float" office:value="0" calcext:value-type="float">
            <text:p>0</text:p>
          </table:table-cell>
          <table:table-cell/>
          <table:table-cell table:formula="of:=&quot;{&quot;&quot;&quot;&amp;[.B17]&amp;&quot;&quot;&quot;, &quot;&amp;[.C17]&amp;&quot;},&quot;" office:value-type="string" office:string-value="{&quot;3.12&quot;, 0}," calcext:value-type="string">
            <text:p>{"3.12", 0},</text:p>
          </table:table-cell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31: 1.16 Volts p-p </text:p>
          </table:table-cell>
          <table:table-cell table:formula="of:=MID([.A20];5;4)" office:value-type="string" office:string-value="1.16" calcext:value-type="string">
            <text:p>1.16</text:p>
          </table:table-cell>
          <table:table-cell table:formula="of:=VALUE(LEFT([.A20];2))" office:value-type="float" office:value="31" calcext:value-type="float">
            <text:p>31</text:p>
          </table:table-cell>
          <table:table-cell/>
          <table:table-cell table:formula="of:=&quot;{&quot;&quot;&quot;&amp;[.B20]&amp;&quot;&quot;&quot;, &quot;&amp;[.C20]&amp;&quot;},&quot;" office:value-type="string" office:string-value="{&quot;1.16&quot;, 31}," calcext:value-type="string">
            <text:p>{"1.16", 31},</text:p>
          </table:table-cell>
        </table:table-row>
        <table:table-row table:style-name="ro1">
          <table:table-cell office:value-type="string" calcext:value-type="string">
            <text:p>30: 1.22 Volts p-p</text:p>
          </table:table-cell>
          <table:table-cell table:formula="of:=MID([.A21];5;4)" office:value-type="string" office:string-value="1.22" calcext:value-type="string">
            <text:p>1.22</text:p>
          </table:table-cell>
          <table:table-cell table:formula="of:=VALUE(LEFT([.A21];2))" office:value-type="float" office:value="30" calcext:value-type="float">
            <text:p>30</text:p>
          </table:table-cell>
          <table:table-cell/>
          <table:table-cell table:formula="of:=&quot;{&quot;&quot;&quot;&amp;[.B21]&amp;&quot;&quot;&quot;, &quot;&amp;[.C21]&amp;&quot;},&quot;" office:value-type="string" office:string-value="{&quot;1.22&quot;, 30}," calcext:value-type="string">
            <text:p>{"1.22", 30},</text:p>
          </table:table-cell>
        </table:table-row>
        <table:table-row table:style-name="ro1">
          <table:table-cell office:value-type="string" calcext:value-type="string">
            <text:p>29: 1.29 Volts p-p <text:s/>(default)</text:p>
          </table:table-cell>
          <table:table-cell table:formula="of:=MID([.A22];5;4)" office:value-type="string" office:string-value="1.29" calcext:value-type="string">
            <text:p>1.29</text:p>
          </table:table-cell>
          <table:table-cell table:formula="of:=VALUE(LEFT([.A22];2))" office:value-type="float" office:value="29" calcext:value-type="float">
            <text:p>29</text:p>
          </table:table-cell>
          <table:table-cell/>
          <table:table-cell table:formula="of:=&quot;{&quot;&quot;&quot;&amp;[.B22]&amp;&quot;&quot;&quot;, &quot;&amp;[.C22]&amp;&quot;},&quot;" office:value-type="string" office:string-value="{&quot;1.29&quot;, 29}," calcext:value-type="string">
            <text:p>{"1.29", 29},</text:p>
          </table:table-cell>
        </table:table-row>
        <table:table-row table:style-name="ro1">
          <table:table-cell office:value-type="string" calcext:value-type="string">
            <text:p>28: 1.37 Volts p-p</text:p>
          </table:table-cell>
          <table:table-cell table:formula="of:=MID([.A23];5;4)" office:value-type="string" office:string-value="1.37" calcext:value-type="string">
            <text:p>1.37</text:p>
          </table:table-cell>
          <table:table-cell table:formula="of:=VALUE(LEFT([.A23];2))" office:value-type="float" office:value="28" calcext:value-type="float">
            <text:p>28</text:p>
          </table:table-cell>
          <table:table-cell/>
          <table:table-cell table:formula="of:=&quot;{&quot;&quot;&quot;&amp;[.B23]&amp;&quot;&quot;&quot;, &quot;&amp;[.C23]&amp;&quot;},&quot;" office:value-type="string" office:string-value="{&quot;1.37&quot;, 28}," calcext:value-type="string">
            <text:p>{"1.37", 28},</text:p>
          </table:table-cell>
        </table:table-row>
        <table:table-row table:style-name="ro1">
          <table:table-cell office:value-type="string" calcext:value-type="string">
            <text:p>27: 1.44 Volts p-p</text:p>
          </table:table-cell>
          <table:table-cell table:formula="of:=MID([.A24];5;4)" office:value-type="string" office:string-value="1.44" calcext:value-type="string">
            <text:p>1.44</text:p>
          </table:table-cell>
          <table:table-cell table:formula="of:=VALUE(LEFT([.A24];2))" office:value-type="float" office:value="27" calcext:value-type="float">
            <text:p>27</text:p>
          </table:table-cell>
          <table:table-cell/>
          <table:table-cell table:formula="of:=&quot;{&quot;&quot;&quot;&amp;[.B24]&amp;&quot;&quot;&quot;, &quot;&amp;[.C24]&amp;&quot;},&quot;" office:value-type="string" office:string-value="{&quot;1.44&quot;, 27}," calcext:value-type="string">
            <text:p>{"1.44", 27},</text:p>
          </table:table-cell>
        </table:table-row>
        <table:table-row table:style-name="ro1">
          <table:table-cell office:value-type="string" calcext:value-type="string">
            <text:p>26: 1.53 Volts p-p</text:p>
          </table:table-cell>
          <table:table-cell table:formula="of:=MID([.A25];5;4)" office:value-type="string" office:string-value="1.53" calcext:value-type="string">
            <text:p>1.53</text:p>
          </table:table-cell>
          <table:table-cell table:formula="of:=VALUE(LEFT([.A25];2))" office:value-type="float" office:value="26" calcext:value-type="float">
            <text:p>26</text:p>
          </table:table-cell>
          <table:table-cell/>
          <table:table-cell table:formula="of:=&quot;{&quot;&quot;&quot;&amp;[.B25]&amp;&quot;&quot;&quot;, &quot;&amp;[.C25]&amp;&quot;},&quot;" office:value-type="string" office:string-value="{&quot;1.53&quot;, 26}," calcext:value-type="string">
            <text:p>{"1.53", 26},</text:p>
          </table:table-cell>
        </table:table-row>
        <table:table-row table:style-name="ro1">
          <table:table-cell office:value-type="string" calcext:value-type="string">
            <text:p>25: 1.62 Volts p-p</text:p>
          </table:table-cell>
          <table:table-cell table:formula="of:=MID([.A26];5;4)" office:value-type="string" office:string-value="1.62" calcext:value-type="string">
            <text:p>1.62</text:p>
          </table:table-cell>
          <table:table-cell table:formula="of:=VALUE(LEFT([.A26];2))" office:value-type="float" office:value="25" calcext:value-type="float">
            <text:p>25</text:p>
          </table:table-cell>
          <table:table-cell/>
          <table:table-cell table:formula="of:=&quot;{&quot;&quot;&quot;&amp;[.B26]&amp;&quot;&quot;&quot;, &quot;&amp;[.C26]&amp;&quot;},&quot;" office:value-type="string" office:string-value="{&quot;1.62&quot;, 25}," calcext:value-type="string">
            <text:p>{"1.62", 25},</text:p>
          </table:table-cell>
        </table:table-row>
        <table:table-row table:style-name="ro1">
          <table:table-cell office:value-type="string" calcext:value-type="string">
            <text:p>24: 1.71 Volts p-p</text:p>
          </table:table-cell>
          <table:table-cell table:formula="of:=MID([.A27];5;4)" office:value-type="string" office:string-value="1.71" calcext:value-type="string">
            <text:p>1.71</text:p>
          </table:table-cell>
          <table:table-cell table:formula="of:=VALUE(LEFT([.A27];2))" office:value-type="float" office:value="24" calcext:value-type="float">
            <text:p>24</text:p>
          </table:table-cell>
          <table:table-cell/>
          <table:table-cell table:formula="of:=&quot;{&quot;&quot;&quot;&amp;[.B27]&amp;&quot;&quot;&quot;, &quot;&amp;[.C27]&amp;&quot;},&quot;" office:value-type="string" office:string-value="{&quot;1.71&quot;, 24}," calcext:value-type="string">
            <text:p>{"1.71", 24},</text:p>
          </table:table-cell>
        </table:table-row>
        <table:table-row table:style-name="ro1">
          <table:table-cell office:value-type="string" calcext:value-type="string">
            <text:p>23: 1.80 Volts p-p</text:p>
          </table:table-cell>
          <table:table-cell table:formula="of:=MID([.A28];5;4)" office:value-type="string" office:string-value="1.80" calcext:value-type="string">
            <text:p>1.80</text:p>
          </table:table-cell>
          <table:table-cell table:formula="of:=VALUE(LEFT([.A28];2))" office:value-type="float" office:value="23" calcext:value-type="float">
            <text:p>23</text:p>
          </table:table-cell>
          <table:table-cell/>
          <table:table-cell table:formula="of:=&quot;{&quot;&quot;&quot;&amp;[.B28]&amp;&quot;&quot;&quot;, &quot;&amp;[.C28]&amp;&quot;},&quot;" office:value-type="string" office:string-value="{&quot;1.80&quot;, 23}," calcext:value-type="string">
            <text:p>{"1.80", 23},</text:p>
          </table:table-cell>
        </table:table-row>
        <table:table-row table:style-name="ro1">
          <table:table-cell office:value-type="string" calcext:value-type="string">
            <text:p>22: 1.91 Volts p-p</text:p>
          </table:table-cell>
          <table:table-cell table:formula="of:=MID([.A29];5;4)" office:value-type="string" office:string-value="1.91" calcext:value-type="string">
            <text:p>1.91</text:p>
          </table:table-cell>
          <table:table-cell table:formula="of:=VALUE(LEFT([.A29];2))" office:value-type="float" office:value="22" calcext:value-type="float">
            <text:p>22</text:p>
          </table:table-cell>
          <table:table-cell/>
          <table:table-cell table:formula="of:=&quot;{&quot;&quot;&quot;&amp;[.B29]&amp;&quot;&quot;&quot;, &quot;&amp;[.C29]&amp;&quot;},&quot;" office:value-type="string" office:string-value="{&quot;1.91&quot;, 22}," calcext:value-type="string">
            <text:p>{"1.91", 22},</text:p>
          </table:table-cell>
        </table:table-row>
        <table:table-row table:style-name="ro1">
          <table:table-cell office:value-type="string" calcext:value-type="string">
            <text:p>21: 2.02 Volts p-p</text:p>
          </table:table-cell>
          <table:table-cell table:formula="of:=MID([.A30];5;4)" office:value-type="string" office:string-value="2.02" calcext:value-type="string">
            <text:p>2.02</text:p>
          </table:table-cell>
          <table:table-cell table:formula="of:=VALUE(LEFT([.A30];2))" office:value-type="float" office:value="21" calcext:value-type="float">
            <text:p>21</text:p>
          </table:table-cell>
          <table:table-cell/>
          <table:table-cell table:formula="of:=&quot;{&quot;&quot;&quot;&amp;[.B30]&amp;&quot;&quot;&quot;, &quot;&amp;[.C30]&amp;&quot;},&quot;" office:value-type="string" office:string-value="{&quot;2.02&quot;, 21}," calcext:value-type="string">
            <text:p>{"2.02", 21},</text:p>
          </table:table-cell>
        </table:table-row>
        <table:table-row table:style-name="ro1">
          <table:table-cell office:value-type="string" calcext:value-type="string">
            <text:p>20: 2.14 Volts p-p</text:p>
          </table:table-cell>
          <table:table-cell table:formula="of:=MID([.A31];5;4)" office:value-type="string" office:string-value="2.14" calcext:value-type="string">
            <text:p>2.14</text:p>
          </table:table-cell>
          <table:table-cell table:formula="of:=VALUE(LEFT([.A31];2))" office:value-type="float" office:value="20" calcext:value-type="float">
            <text:p>20</text:p>
          </table:table-cell>
          <table:table-cell/>
          <table:table-cell table:formula="of:=&quot;{&quot;&quot;&quot;&amp;[.B31]&amp;&quot;&quot;&quot;, &quot;&amp;[.C31]&amp;&quot;},&quot;" office:value-type="string" office:string-value="{&quot;2.14&quot;, 20}," calcext:value-type="string">
            <text:p>{"2.14", 20},</text:p>
          </table:table-cell>
        </table:table-row>
        <table:table-row table:style-name="ro1">
          <table:table-cell office:value-type="string" calcext:value-type="string">
            <text:p>19: 2.26 Volts p-p</text:p>
          </table:table-cell>
          <table:table-cell table:formula="of:=MID([.A32];5;4)" office:value-type="string" office:string-value="2.26" calcext:value-type="string">
            <text:p>2.26</text:p>
          </table:table-cell>
          <table:table-cell table:formula="of:=VALUE(LEFT([.A32];2))" office:value-type="float" office:value="19" calcext:value-type="float">
            <text:p>19</text:p>
          </table:table-cell>
          <table:table-cell/>
          <table:table-cell table:formula="of:=&quot;{&quot;&quot;&quot;&amp;[.B32]&amp;&quot;&quot;&quot;, &quot;&amp;[.C32]&amp;&quot;},&quot;" office:value-type="string" office:string-value="{&quot;2.26&quot;, 19}," calcext:value-type="string">
            <text:p>{"2.26", 19},</text:p>
          </table:table-cell>
        </table:table-row>
        <table:table-row table:style-name="ro1">
          <table:table-cell office:value-type="string" calcext:value-type="string">
            <text:p>18: 2.39 Volts p-p</text:p>
          </table:table-cell>
          <table:table-cell table:formula="of:=MID([.A33];5;4)" office:value-type="string" office:string-value="2.39" calcext:value-type="string">
            <text:p>2.39</text:p>
          </table:table-cell>
          <table:table-cell table:formula="of:=VALUE(LEFT([.A33];2))" office:value-type="float" office:value="18" calcext:value-type="float">
            <text:p>18</text:p>
          </table:table-cell>
          <table:table-cell/>
          <table:table-cell table:formula="of:=&quot;{&quot;&quot;&quot;&amp;[.B33]&amp;&quot;&quot;&quot;, &quot;&amp;[.C33]&amp;&quot;},&quot;" office:value-type="string" office:string-value="{&quot;2.39&quot;, 18}," calcext:value-type="string">
            <text:p>{"2.39", 18},</text:p>
          </table:table-cell>
        </table:table-row>
        <table:table-row table:style-name="ro1">
          <table:table-cell office:value-type="string" calcext:value-type="string">
            <text:p>17: 2.53 Volts p-p</text:p>
          </table:table-cell>
          <table:table-cell table:formula="of:=MID([.A34];5;4)" office:value-type="string" office:string-value="2.53" calcext:value-type="string">
            <text:p>2.53</text:p>
          </table:table-cell>
          <table:table-cell table:formula="of:=VALUE(LEFT([.A34];2))" office:value-type="float" office:value="17" calcext:value-type="float">
            <text:p>17</text:p>
          </table:table-cell>
          <table:table-cell/>
          <table:table-cell table:formula="of:=&quot;{&quot;&quot;&quot;&amp;[.B34]&amp;&quot;&quot;&quot;, &quot;&amp;[.C34]&amp;&quot;},&quot;" office:value-type="string" office:string-value="{&quot;2.53&quot;, 17}," calcext:value-type="string">
            <text:p>{"2.53", 17},</text:p>
          </table:table-cell>
        </table:table-row>
        <table:table-row table:style-name="ro1">
          <table:table-cell office:value-type="string" calcext:value-type="string">
            <text:p>16: 2.67 Volts p-p</text:p>
          </table:table-cell>
          <table:table-cell table:formula="of:=MID([.A35];5;4)" office:value-type="string" office:string-value="2.67" calcext:value-type="string">
            <text:p>2.67</text:p>
          </table:table-cell>
          <table:table-cell table:formula="of:=VALUE(LEFT([.A35];2))" office:value-type="float" office:value="16" calcext:value-type="float">
            <text:p>16</text:p>
          </table:table-cell>
          <table:table-cell/>
          <table:table-cell table:formula="of:=&quot;{&quot;&quot;&quot;&amp;[.B35]&amp;&quot;&quot;&quot;, &quot;&amp;[.C35]&amp;&quot;},&quot;" office:value-type="string" office:string-value="{&quot;2.67&quot;, 16}," calcext:value-type="string">
            <text:p>{"2.67", 16},</text:p>
          </table:table-cell>
        </table:table-row>
        <table:table-row table:style-name="ro1">
          <table:table-cell office:value-type="string" calcext:value-type="string">
            <text:p>15: 2.83 Volts p-p</text:p>
          </table:table-cell>
          <table:table-cell table:formula="of:=MID([.A36];5;4)" office:value-type="string" office:string-value="2.83" calcext:value-type="string">
            <text:p>2.83</text:p>
          </table:table-cell>
          <table:table-cell table:formula="of:=VALUE(LEFT([.A36];2))" office:value-type="float" office:value="15" calcext:value-type="float">
            <text:p>15</text:p>
          </table:table-cell>
          <table:table-cell/>
          <table:table-cell table:formula="of:=&quot;{&quot;&quot;&quot;&amp;[.B36]&amp;&quot;&quot;&quot;, &quot;&amp;[.C36]&amp;&quot;},&quot;" office:value-type="string" office:string-value="{&quot;2.83&quot;, 15}," calcext:value-type="string">
            <text:p>{"2.83", 15},</text:p>
          </table:table-cell>
        </table:table-row>
        <table:table-row table:style-name="ro1">
          <table:table-cell office:value-type="string" calcext:value-type="string">
            <text:p>14: 2.98 Volts p-p</text:p>
          </table:table-cell>
          <table:table-cell table:formula="of:=MID([.A37];5;4)" office:value-type="string" office:string-value="2.98" calcext:value-type="string">
            <text:p>2.98</text:p>
          </table:table-cell>
          <table:table-cell table:formula="of:=VALUE(LEFT([.A37];2))" office:value-type="float" office:value="14" calcext:value-type="float">
            <text:p>14</text:p>
          </table:table-cell>
          <table:table-cell/>
          <table:table-cell table:formula="of:=&quot;{&quot;&quot;&quot;&amp;[.B37]&amp;&quot;&quot;&quot;, &quot;&amp;[.C37]&amp;&quot;},&quot;" office:value-type="string" office:string-value="{&quot;2.98&quot;, 14}," calcext:value-type="string">
            <text:p>{"2.98", 14},</text:p>
          </table:table-cell>
        </table:table-row>
        <table:table-row table:style-name="ro1">
          <table:table-cell office:value-type="string" calcext:value-type="string">
            <text:p>13: 3.16 Volts p-p</text:p>
          </table:table-cell>
          <table:table-cell table:formula="of:=MID([.A38];5;4)" office:value-type="string" office:string-value="3.16" calcext:value-type="string">
            <text:p>3.16</text:p>
          </table:table-cell>
          <table:table-cell table:formula="of:=VALUE(LEFT([.A38];2))" office:value-type="float" office:value="13" calcext:value-type="float">
            <text:p>13</text:p>
          </table:table-cell>
          <table:table-cell/>
          <table:table-cell table:formula="of:=&quot;{&quot;&quot;&quot;&amp;[.B38]&amp;&quot;&quot;&quot;, &quot;&amp;[.C38]&amp;&quot;},&quot;" office:value-type="string" office:string-value="{&quot;3.16&quot;, 13}," calcext:value-type="string">
            <text:p>{"3.16", 13},</text:p>
          </table:table-cell>
        </table:table-row>
      </table:table>
      <table:named-expressions/>
      <table:database-ranges>
        <table:database-range table:name="__Anonymous_Sheet_DB__1" table:target-range-address="Sheet2.A2:Sheet2.E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 style:data-style-name="N2" text:time-value="11:39:12.2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6T09:22:49.550000000</meta:creation-date>
    <dc:date>2023-08-30T22:23:53.075000000</dc:date>
    <meta:editing-duration>PT17H2M47S</meta:editing-duration>
    <meta:editing-cycles>11</meta:editing-cycles>
    <meta:generator>LibreOffice/6.1.5.2$Windows_X86_64 LibreOffice_project/90f8dcf33c87b3705e78202e3df5142b201bd805</meta:generator>
    <meta:document-statistic meta:table-count="2" meta:cell-count="277" meta:object-count="0"/>
  </office:meta>
</office:document-meta>
</file>