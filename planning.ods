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107.65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3.8mm" svg:height="107.65mm" svg:x="224.83mm" svg:y="196.03mm">
            <draw:text-box>
              <text:p>When a MIDI Note On is received, we want to:</text:p>
              <text:p>* EXCEPT if it’s the first / only playing voice...</text:p>
              <text:p>* ...create copies of all objects marked as “per-voice”: keep in a separate list-of-lists</text:p>
              <text:p>* ...create all internal-only connections</text:p>
              <text:p>* ...create all input connections (coming from “global” objects e.g. master LFO)</text:p>
              <text:p>* ...create only output connections if they go to a mixer object with free inputs</text:p>
              <text:p>* set frequencies for waveform and tracking filter objects from note pitch</text:p>
              <text:p>* send noteOn() to all per-voice envelopes</text:p>
              <text:p>* set other parameters from velocity: TBD</text:p>
              <text:p/>
              <text:p>When MIDI Note Off is received:</text:p>
              <text:p>* send noteOff() to all per-voice envelopes</text:p>
              <text:p>* EXCEPT if the voice is the master design...</text:p>
              <text:p>* ...move per-voice object list to “releasing” list</text:p>
              <text:p/>
              <text:p>When all envelopes in a releasing list entry are inactive:</text:p>
              <text:p>* delete all patchcords connected to them</text:p>
              <text:p>* delete all the objects</text:p>
              <text:p/>
              <text:p>Thoughts:</text:p>
              <text:p>* Allow WaveformDc object to capture note pitch and velocity</text:p>
              <text:p/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528a</text:p>
          </table:table-cell>
          <table:table-cell table:formula="of:=HEX2DEC(MID([.H3];3;999))" office:value-type="float" office:value="21130" calcext:value-type="float">
            <text:p>21130</text:p>
          </table:table-cell>
          <table:table-cell table:formula="of:=BITAND([.I3];63488)/2048*8" office:value-type="float" office:value="80" calcext:value-type="float">
            <text:p>80</text:p>
          </table:table-cell>
          <table:table-cell table:formula="of:=BITAND([.I3];2016)/32*4" office:value-type="float" office:value="80" calcext:value-type="float">
            <text:p>80</text:p>
          </table:table-cell>
          <table:table-cell table:formula="of:=BITAND([.I3];31)*8" office:value-type="float" office:value="80" calcext:value-type="float">
            <text:p>80</text:p>
          </table:table-cell>
          <table:table-cell table:formula="of:=&quot;0x&quot;&amp;DEC2HEX(INT([.J3]/8)*2048+INT([.K3]/4)*32+INT([.L3]/8))" office:value-type="string" office:string-value="0x528A" calcext:value-type="string">
            <text:p>0x528A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table:number-columns-repeated="2" office:value-type="float" office:value="80" calcext:value-type="float">
            <text:p>80</text:p>
          </table:table-cell>
          <table:table-cell table:formula="of:=[.K4]" office:value-type="float" office:value="80" calcext:value-type="float">
            <text:p>80</text:p>
          </table:table-cell>
          <table:table-cell table:formula="of:=&quot;0x&quot;&amp;DEC2HEX(INT([.J4]/8)*2048+INT([.K4]/4)*32+INT([.L4]/8))" office:value-type="string" office:string-value="0x528A" calcext:value-type="string">
            <text:p>0x528A</text:p>
          </table:table-cell>
          <table:table-cell table:number-columns-repeated="2"/>
          <table:table-cell table:formula="of:=LOG([.P3]/[.P2])/LOG([.P1])" office:value-type="float" office:value="10.9657842846621" calcext:value-type="float">
            <text:p>10.9657842846621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[.M4]" office:value-type="string" office:string-value="0x528A" calcext:value-type="string">
            <text:p>0x528A</text:p>
          </table:table-cell>
          <table:table-cell table:formula="of:=HEX2DEC(MID([.H5];3;999))" office:value-type="float" office:value="21130" calcext:value-type="float">
            <text:p>21130</text:p>
          </table:table-cell>
          <table:table-cell table:formula="of:=BITAND([.I5];63488)/2048*8" office:value-type="float" office:value="80" calcext:value-type="float">
            <text:p>80</text:p>
          </table:table-cell>
          <table:table-cell table:formula="of:=BITAND([.I5];2016)/32*4" office:value-type="float" office:value="80" calcext:value-type="float">
            <text:p>80</text:p>
          </table:table-cell>
          <table:table-cell table:formula="of:=BITAND([.I5];31)*8" office:value-type="float" office:value="80" calcext:value-type="float">
            <text:p>80</text:p>
          </table:table-cell>
          <table:table-cell table:formula="of:=&quot;0x&quot;&amp;DEC2HEX(INT([.J5]/8)*2048+INT([.K5]/4)*32+INT([.L5]/8))" office:value-type="string" office:string-value="0x528A" calcext:value-type="string">
            <text:p>0x528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P$1]^([.O7]*[.P$4]/130)*[.P$2]" office:value-type="float" office:value="5" calcext:value-type="float">
            <text:p>5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style-name="ce3" table:formula="of:=[.P$1]^([.O8]*[.P$4]/130)*[.P$2]" office:value-type="float" office:value="8.97212650928862" calcext:value-type="float">
            <text:p>8.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style-name="ce3" table:formula="of:=[.P$1]^([.O9]*[.P$4]/130)*[.P$2]" office:value-type="float" office:value="16.0998108197359" calcext:value-type="float">
            <text:p>16.1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style-name="ce3" table:formula="of:=[.P$1]^([.O10]*[.P$4]/130)*[.P$2]" office:value-type="float" office:value="28.8899078900569" calcext:value-type="float">
            <text:p>28.8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style-name="ce3" table:formula="of:=[.P$1]^([.O11]*[.P$4]/130)*[.P$2]" office:value-type="float" office:value="51.8407816862572" calcext:value-type="float">
            <text:p>51.8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style-name="ce3" table:formula="of:=[.P$1]^([.O12]*[.P$4]/130)*[.P$2]" office:value-type="float" office:value="93.0244103259025" calcext:value-type="float">
            <text:p>93.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style-name="ce3" table:formula="of:=[.P$1]^([.O13]*[.P$4]/130)*[.P$2]" office:value-type="float" office:value="166.925355579194" calcext:value-type="float">
            <text:p>166.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style-name="ce3" table:formula="of:=[.P$1]^([.O14]*[.P$4]/130)*[.P$2]" office:value-type="float" office:value="299.535081572904" calcext:value-type="float">
            <text:p>299.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style-name="ce3" table:formula="of:=[.P$1]^([.O15]*[.P$4]/130)*[.P$2]" office:value-type="float" office:value="537.493329168436" calcext:value-type="float">
            <text:p>537.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style-name="ce3" table:formula="of:=[.P$1]^([.O16]*[.P$4]/130)*[.P$2]" office:value-type="float" office:value="964.491629439585" calcext:value-type="float">
            <text:p>964.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style-name="ce3" table:formula="of:=[.P$1]^([.O17]*[.P$4]/130)*[.P$2]" office:value-type="float" office:value="1730.70818329638" calcext:value-type="float">
            <text:p>1730.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style-name="ce3" table:formula="of:=[.P$1]^([.O18]*[.P$4]/130)*[.P$2]" office:value-type="float" office:value="3105.62655423923" calcext:value-type="float">
            <text:p>3105.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style-name="ce3" table:formula="of:=[.P$1]^([.O19]*[.P$4]/130)*[.P$2]" office:value-type="float" office:value="5572.8148670481" calcext:value-type="float">
            <text:p>5572.8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style-name="ce3" table:formula="of:=[.P$1]^([.O20]*[.P$4]/130)*[.P$2]" office:value-type="float" office:value="10000" calcext:value-type="float">
            <text:p>10000.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1"/>
          <table:table-cell office:value-type="string" calcext:value-type="string">
            <text:p>base</text:p>
          </table:table-cell>
          <table:table-cell table:formula="of:=1200/6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14"/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LOG([.O25])/LOG(2)" office:value-type="float" office:value="2.32192809488736" calcext:value-type="float">
            <text:p>2.32192809488736</text:p>
          </table:table-cell>
          <table:table-cell table:number-columns-repeated="2"/>
          <table:table-cell office:value-type="string" calcext:value-type="string">
            <text:p>Hammond notes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T27]/[.U27]" office:value-type="float" office:value="0.817307692307692" calcext:value-type="float">
            <text:p>0.817307692307692</text:p>
          </table:table-cell>
          <table:table-cell table:formula="of:=[.V27]*[.$W$23]*2^[.$W$24]" office:value-type="float" office:value="32.6923076923077" calcext:value-type="float">
            <text:p>32.6923076923077</text:p>
          </table:table-cell>
          <table:table-cell/>
          <table:table-cell table:formula="of:=[.T27]&amp;&quot;.0f /&quot;&amp;[.U27]&amp;&quot;.0f * HAMMOND_BASE, // &quot;&amp;[.S27]" office:value-type="string" office:string-value="85.0f /104.0f * HAMMOND_BASE, // C" calcext:value-type="string">
            <text:p>85.0f /104.0f * HAMMOND_BASE, // 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trl / enc setting:</text:p>
          </table:table-cell>
          <table:table-cell table:number-columns-repeated="14"/>
          <table:table-cell office:value-type="string" calcext:value-type="string">
            <text:p>C#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T28]/[.U28]" office:value-type="float" office:value="0.865853658536585" calcext:value-type="float">
            <text:p>0.865853658536585</text:p>
          </table:table-cell>
          <table:table-cell table:formula="of:=[.V28]*[.$W$23]*2^[.$W$24]" office:value-type="float" office:value="34.6341463414634" calcext:value-type="float">
            <text:p>34.6341463414634</text:p>
          </table:table-cell>
          <table:table-cell/>
          <table:table-cell table:formula="of:=[.T28]&amp;&quot;.0f /&quot;&amp;[.U28]&amp;&quot;.0f * HAMMOND_BASE, // &quot;&amp;[.S28]" office:value-type="string" office:string-value="71.0f /82.0f * HAMMOND_BASE, // C#" calcext:value-type="string">
            <text:p>71.0f /82.0f * HAMMOND_BASE, // C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office:value-type="float" office:value="272.52" calcext:value-type="float">
            <text:p>272.52</text:p>
          </table:table-cell>
          <table:table-cell office:value-type="string" calcext:value-type="string">
            <text:p>Hz</text:p>
          </table:table-cell>
          <table:table-cell table:number-columns-repeated="6"/>
          <table:table-cell office:value-type="string" calcext:value-type="string">
            <text:p>MIDI setting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[.T29]/[.U29]" office:value-type="float" office:value="0.917808219178082" calcext:value-type="float">
            <text:p>0.917808219178082</text:p>
          </table:table-cell>
          <table:table-cell table:formula="of:=[.V29]*[.$W$23]*2^[.$W$24]" office:value-type="float" office:value="36.7123287671233" calcext:value-type="float">
            <text:p>36.7123287671233</text:p>
          </table:table-cell>
          <table:table-cell/>
          <table:table-cell table:formula="of:=[.T29]&amp;&quot;.0f /&quot;&amp;[.U29]&amp;&quot;.0f * HAMMOND_BASE, // &quot;&amp;[.S29]" office:value-type="string" office:string-value="67.0f /73.0f * HAMMOND_BASE, // D" calcext:value-type="string">
            <text:p>67.0f /73.0f * HAMMOND_BASE, // 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2(freq)</text:p>
          </table:table-cell>
          <table:table-cell table:formula="of:=LOG([.E29])/LOG(2)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Waveform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mp scaling</text:p>
          </table:table-cell>
          <table:table-cell table:number-columns-repeated="2"/>
          <table:table-cell office:value-type="string" calcext:value-type="string">
            <text:p>D#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[.T30]/[.U30]" office:value-type="float" office:value="0.972222222222222" calcext:value-type="float">
            <text:p>0.972222222222222</text:p>
          </table:table-cell>
          <table:table-cell table:formula="of:=[.V30]*[.$W$23]*2^[.$W$24]" office:value-type="float" office:value="38.8888888888889" calcext:value-type="float">
            <text:p>38.8888888888889</text:p>
          </table:table-cell>
          <table:table-cell/>
          <table:table-cell table:formula="of:=[.T30]&amp;&quot;.0f /&quot;&amp;[.U30]&amp;&quot;.0f * HAMMOND_BASE, // &quot;&amp;[.S30]" office:value-type="string" office:string-value="70.0f /72.0f * HAMMOND_BASE, // D#" calcext:value-type="string">
            <text:p>70.0f /72.0f * HAMMOND_BASE, // D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_NOTE_A</text:p>
          </table:table-cell>
          <table:table-cell table:formula="of:=[.F14]-INT([.F14])" office:value-type="float" office:value="0.78135971352466" calcext:value-type="float">
            <text:p>0.78135971352466</text:p>
          </table:table-cell>
          <table:table-cell table:number-columns-repeated="8"/>
          <table:table-cell table:style-name="ce9" office:value-type="string" calcext:value-type="string">
            <text:p>CC</text:p>
          </table:table-cell>
          <table:table-cell office:value-type="string" calcext:value-type="string">
            <text:p>pulse width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formula="of:=[.T31]/[.U31]" office:value-type="float" office:value="1.02985074626866" calcext:value-type="float">
            <text:p>1.02985074626866</text:p>
          </table:table-cell>
          <table:table-cell table:formula="of:=[.V31]*[.$W$23]*2^[.$W$24]" office:value-type="float" office:value="41.1940298507463" calcext:value-type="float">
            <text:p>41.1940298507463</text:p>
          </table:table-cell>
          <table:table-cell/>
          <table:table-cell table:formula="of:=[.T31]&amp;&quot;.0f /&quot;&amp;[.U31]&amp;&quot;.0f * HAMMOND_BASE, // &quot;&amp;[.S31]" office:value-type="string" office:string-value="69.0f /67.0f * HAMMOND_BASE, // E" calcext:value-type="string">
            <text:p>69.0f /67.0f * HAMMOND_BASE, // 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rt</text:p>
          </table:table-cell>
          <table:table-cell table:formula="of:=FLOOR([.E30]-[.E31])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formula="of:=[.T32]/[.U32]" office:value-type="float" office:value="0.545454545454545" calcext:value-type="float">
            <text:p>0.545454545454545</text:p>
          </table:table-cell>
          <table:table-cell table:formula="of:=[.V32]*[.$W$23]*2^[.$W$24]" office:value-type="float" office:value="21.8181818181818" calcext:value-type="float">
            <text:p>21.8181818181818</text:p>
          </table:table-cell>
          <table:table-cell/>
          <table:table-cell table:formula="of:=[.T32]&amp;&quot;.0f /&quot;&amp;[.U32]&amp;&quot;.0f * HAMMOND_BASE, // &quot;&amp;[.S32]" office:value-type="string" office:string-value="54.0f /99.0f * HAMMOND_BASE, // F" calcext:value-type="string">
            <text:p>54.0f /99.0f * HAMMOND_BASE, // 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c</text:p>
          </table:table-cell>
          <table:table-cell table:formula="of:=[.E30]-[.E32]-[.E31]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envelope</text:p>
          </table:table-cell>
          <table:table-cell table:style-name="ce8" office:value-type="string" calcext:value-type="string">
            <text:p>note on</text:p>
          </table:table-cell>
          <table:table-cell table:number-columns-repeated="4"/>
          <table:table-cell office:value-type="string" calcext:value-type="string">
            <text:p>F#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[.T33]/[.U33]" office:value-type="float" office:value="0.578125" calcext:value-type="float">
            <text:p>0.578125</text:p>
          </table:table-cell>
          <table:table-cell table:formula="of:=[.V33]*[.$W$23]*2^[.$W$24]" office:value-type="float" office:value="23.125" calcext:value-type="float">
            <text:p>23.125</text:p>
          </table:table-cell>
          <table:table-cell/>
          <table:table-cell table:formula="of:=[.T33]&amp;&quot;.0f /&quot;&amp;[.U33]&amp;&quot;.0f * HAMMOND_BASE, // &quot;&amp;[.S33]" office:value-type="string" office:string-value="37.0f /64.0f * HAMMOND_BASE, // F#" calcext:value-type="string">
            <text:p>37.0f /64.0f * HAMMOND_BASE, // F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 value</text:p>
          </table:table-cell>
          <table:table-cell table:formula="of:=IF([.E33]&gt;0.5;1;0)+[.E32]" office:value-type="float" office:value="7" calcext:value-type="float">
            <text:p>7</text:p>
          </table:table-cell>
          <table:table-cell table:number-columns-repeated="8"/>
          <table:table-cell table:style-name="ce10" office:value-type="string" calcext:value-type="string">
            <text:p>note off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formula="of:=[.T34]/[.U34]" office:value-type="float" office:value="0.6125" calcext:value-type="float">
            <text:p>0.6125</text:p>
          </table:table-cell>
          <table:table-cell table:formula="of:=[.V34]*[.$W$23]*2^[.$W$24]" office:value-type="float" office:value="24.5" calcext:value-type="float">
            <text:p>24.5</text:p>
          </table:table-cell>
          <table:table-cell/>
          <table:table-cell table:formula="of:=[.T34]&amp;&quot;.0f /&quot;&amp;[.U34]&amp;&quot;.0f * HAMMOND_BASE, // &quot;&amp;[.S34]" office:value-type="string" office:string-value="49.0f /80.0f * HAMMOND_BASE, // G" calcext:value-type="string">
            <text:p>49.0f /80.0f * HAMMOND_BASE, // 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 frac</text:p>
          </table:table-cell>
          <table:table-cell table:formula="of:=IF([.E33]&gt;0.5;[.E33]-1;[.E33])" office:value-type="float" office:value="0.308858588128661" calcext:value-type="float">
            <text:p>0.308858588128661</text:p>
          </table:table-cell>
          <table:table-cell table:number-columns-repeated="7"/>
          <table:table-cell office:value-type="string" calcext:value-type="string">
            <text:p>WaveformDc</text:p>
          </table:table-cell>
          <table:table-cell table:style-name="ce9" office:value-type="string" calcext:value-type="string">
            <text:p>CC</text:p>
          </table:table-cell>
          <table:table-cell office:value-type="string" calcext:value-type="string">
            <text:p>amplitude</text:p>
          </table:table-cell>
          <table:table-cell table:number-columns-repeated="3"/>
          <table:table-cell office:value-type="string" calcext:value-type="string">
            <text:p>G#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formula="of:=[.T35]/[.U35]" office:value-type="float" office:value="0.648648648648649" calcext:value-type="float">
            <text:p>0.648648648648649</text:p>
          </table:table-cell>
          <table:table-cell table:formula="of:=[.V35]*[.$W$23]*2^[.$W$24]" office:value-type="float" office:value="25.9459459459459" calcext:value-type="float">
            <text:p>25.9459459459459</text:p>
          </table:table-cell>
          <table:table-cell/>
          <table:table-cell table:formula="of:=[.T35]&amp;&quot;.0f /&quot;&amp;[.U35]&amp;&quot;.0f * HAMMOND_BASE, // &quot;&amp;[.S35]" office:value-type="string" office:string-value="48.0f /74.0f * HAMMOND_BASE, // G#" calcext:value-type="string">
            <text:p>48.0f /74.0f * HAMMOND_BASE, // G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[.E34]+[.E35]+[.E31]" office:value-type="float" office:value="8.09021830165332" calcext:value-type="float">
            <text:p>8.09021830165332</text:p>
          </table:table-cell>
          <table:table-cell table:number-columns-repeated="7"/>
          <table:table-cell office:value-type="string" calcext:value-type="string">
            <text:p>Ladder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formula="of:=[.T36]/[.U36]" office:value-type="float" office:value="0.6875" calcext:value-type="float">
            <text:p>0.6875</text:p>
          </table:table-cell>
          <table:table-cell table:formula="of:=[.V36]*[.$W$23]*2^[.$W$24]" office:value-type="float" office:value="27.5" calcext:value-type="float">
            <text:p>27.5</text:p>
          </table:table-cell>
          <table:table-cell/>
          <table:table-cell table:formula="of:=[.T36]&amp;&quot;.0f /&quot;&amp;[.U36]&amp;&quot;.0f * HAMMOND_BASE, // &quot;&amp;[.S36]" office:value-type="string" office:string-value="66.0f /96.0f * HAMMOND_BASE, // A" calcext:value-type="string">
            <text:p>66.0f /96.0f * HAMMOND_BASE, // 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</text:p>
          </table:table-cell>
          <table:table-cell table:formula="of:=2^[.E36]" office:value-type="float" office:value="272.52" calcext:value-type="float">
            <text:p>272.52</text:p>
          </table:table-cell>
          <table:table-cell table:number-columns-repeated="7"/>
          <table:table-cell office:value-type="string" calcext:value-type="string">
            <text:p>Biquad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table:number-columns-repeated="3"/>
          <table:table-cell office:value-type="string" calcext:value-type="string">
            <text:p>A#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formula="of:=[.T37]/[.U37]" office:value-type="float" office:value="0.728260869565217" calcext:value-type="float">
            <text:p>0.728260869565217</text:p>
          </table:table-cell>
          <table:table-cell table:formula="of:=[.V37]*[.$W$23]*2^[.$W$24]" office:value-type="float" office:value="29.1304347826087" calcext:value-type="float">
            <text:p>29.1304347826087</text:p>
          </table:table-cell>
          <table:table-cell/>
          <table:table-cell table:formula="of:=[.T37]&amp;&quot;.0f /&quot;&amp;[.U37]&amp;&quot;.0f * HAMMOND_BASE, // &quot;&amp;[.S37]" office:value-type="string" office:string-value="67.0f /92.0f * HAMMOND_BASE, // A#" calcext:value-type="string">
            <text:p>67.0f /92.0f * HAMMOND_BASE, // A#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VF</text:p>
          </table:table-cell>
          <table:table-cell table:style-name="ce8" office:value-type="string" calcext:value-type="string">
            <text:p>note on</text:p>
          </table:table-cell>
          <table:table-cell office:value-type="string" calcext:value-type="string">
            <text:p>freq tracking</text:p>
          </table:table-cell>
          <table:table-cell office:value-type="string" calcext:value-type="string">
            <text:p>velocity f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formula="of:=[.T38]/[.U38]" office:value-type="float" office:value="0.771428571428571" calcext:value-type="float">
            <text:p>0.771428571428571</text:p>
          </table:table-cell>
          <table:table-cell table:formula="of:=[.V38]*[.$W$23]*2^[.$W$24]" office:value-type="float" office:value="30.8571428571429" calcext:value-type="float">
            <text:p>30.8571428571429</text:p>
          </table:table-cell>
          <table:table-cell/>
          <table:table-cell table:formula="of:=[.T38]&amp;&quot;.0f /&quot;&amp;[.U38]&amp;&quot;.0f * HAMMOND_BASE, // &quot;&amp;[.S38]" office:value-type="string" office:string-value="54.0f /70.0f * HAMMOND_BASE, // B" calcext:value-type="string">
            <text:p>54.0f /70.0f * HAMMOND_BASE, // B</text:p>
          </table:table-cell>
        </table:table-row>
        <table:table-row table:style-name="ro1">
          <table:table-cell table:number-columns-repeated="4"/>
          <table:table-cell table:formula="of:=7+0.000493+[.E31]" office:value-type="float" office:value="7.78185271352466" calcext:value-type="float">
            <text:p>7.7818527135246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2^[.E39]" office:value-type="float" office:value="220.075191589765" calcext:value-type="float">
            <text:p>220.075191589765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Need to track attached CCs for when new note starts</text:p>
          </table:table-cell>
          <table:table-cell table:number-columns-repeated="12"/>
        </table:table-row>
      </table:table>
      <table:table table:name="Sheet2" table:style-name="ta1"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20:57:26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9-09T22:27:47.999000000</dc:date>
    <meta:editing-duration>PT20H30M45S</meta:editing-duration>
    <meta:editing-cycles>15</meta:editing-cycles>
    <meta:generator>LibreOffice/6.1.5.2$Windows_X86_64 LibreOffice_project/90f8dcf33c87b3705e78202e3df5142b201bd805</meta:generator>
    <meta:document-statistic meta:table-count="2" meta:cell-count="384" meta:object-count="1"/>
  </office:meta>
</office:document-meta>
</file>