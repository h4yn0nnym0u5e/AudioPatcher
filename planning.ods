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8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Constructor pop-up]</text:p>
          </table:table-cell>
          <table:table-cell table:number-columns-repeated="4"/>
          <table:table-cell office:value-type="string" calcext:value-type="string">
            <text:p>Colou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x a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e</text:p>
          </table:table-cell>
          <table:table-cell table:number-columns-repeated="4"/>
          <table:table-cell office:value-type="string" calcext:value-type="string">
            <text:p>0xAFe5</text:p>
          </table:table-cell>
          <table:table-cell table:formula="of:=HEX2DEC(MID([.H3];3;999))" office:value-type="float" office:value="45029" calcext:value-type="float">
            <text:p>45029</text:p>
          </table:table-cell>
          <table:table-cell table:formula="of:=BITAND([.I3];63488)/2048*8" office:value-type="float" office:value="168" calcext:value-type="float">
            <text:p>168</text:p>
          </table:table-cell>
          <table:table-cell table:formula="of:=BITAND([.I3];2016)/32*4" office:value-type="float" office:value="252" calcext:value-type="float">
            <text:p>252</text:p>
          </table:table-cell>
          <table:table-cell table:formula="of:=BITAND([.I3];31)*8" office:value-type="float" office:value="40" calcext:value-type="float">
            <text:p>40</text:p>
          </table:table-cell>
          <table:table-cell table:formula="of:=&quot;0x&quot;&amp;DEC2HEX(INT([.J3]/8)*2048+INT([.K3]/4)*32+INT([.L3]/8))" office:value-type="string" office:string-value="0xAFE5" calcext:value-type="string">
            <text:p>0xAFE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[.J4]" office:value-type="float" office:value="144" calcext:value-type="float">
            <text:p>144</text:p>
          </table:table-cell>
          <table:table-cell table:formula="of:=[.K4]" office:value-type="float" office:value="144" calcext:value-type="float">
            <text:p>144</text:p>
          </table:table-cell>
          <table:table-cell table:formula="of:=&quot;0x&quot;&amp;DEC2HEX(INT([.J4]/8)*2048+INT([.K4]/4)*32+INT([.L4]/8))" office:value-type="string" office:string-value="0x9492" calcext:value-type="string">
            <text:p>0x9492</text:p>
          </table:table-cell>
        </table:table-row>
        <table:table-row table:style-name="ro1">
          <table:table-cell table:number-columns-repeated="7"/>
          <table:table-cell table:formula="of:=[.M4]" office:value-type="string" office:string-value="0x9492" calcext:value-type="string">
            <text:p>0x9492</text:p>
          </table:table-cell>
          <table:table-cell table:formula="of:=HEX2DEC(MID([.H5];3;999))" office:value-type="float" office:value="38034" calcext:value-type="float">
            <text:p>38034</text:p>
          </table:table-cell>
          <table:table-cell table:formula="of:=BITAND([.I5];63488)/2048*8" office:value-type="float" office:value="144" calcext:value-type="float">
            <text:p>144</text:p>
          </table:table-cell>
          <table:table-cell table:formula="of:=BITAND([.I5];2016)/32*4" office:value-type="float" office:value="144" calcext:value-type="float">
            <text:p>144</text:p>
          </table:table-cell>
          <table:table-cell table:formula="of:=BITAND([.I5];31)*8" office:value-type="float" office:value="144" calcext:value-type="float">
            <text:p>144</text:p>
          </table:table-cell>
          <table:table-cell table:formula="of:=&quot;0x&quot;&amp;DEC2HEX(INT([.J5]/8)*2048+INT([.K5]/4)*32+INT([.L5]/8))" office:value-type="string" office:string-value="0x9492" calcext:value-type="string">
            <text:p>0x9492</text:p>
          </table:table-cell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lect output</text:p>
          </table:table-cell>
          <table:table-cell table:number-columns-repeated="4"/>
          <table:table-cell office:value-type="string" calcext:value-type="string">
            <text:p>0xFD20</text:p>
          </table:table-cell>
          <table:table-cell table:formula="of:=HEX2DEC(MID([.H6];3;999))" office:value-type="float" office:value="64800" calcext:value-type="float">
            <text:p>64800</text:p>
          </table:table-cell>
          <table:table-cell table:formula="of:=BITAND([.I6];63488)/2048*8" office:value-type="float" office:value="248" calcext:value-type="float">
            <text:p>248</text:p>
          </table:table-cell>
          <table:table-cell table:formula="of:=BITAND([.I6];2016)/32*4" office:value-type="float" office:value="164" calcext:value-type="float">
            <text:p>164</text:p>
          </table:table-cell>
          <table:table-cell table:formula="of:=BITAND([.I6];31)*8" office:value-type="float" office:value="0" calcext:value-type="float">
            <text:p>0</text:p>
          </table:table-cell>
          <table:table-cell table:formula="of:=&quot;0x&quot;&amp;DEC2HEX(INT([.J6]/8)*2048+INT([.K6]/4)*32+INT([.L6]/8))" office:value-type="string" office:string-value="0xFD20" calcext:value-type="string">
            <text:p>0xFD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t input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formula="of:=&quot;0x&quot;&amp;DEC2HEX(INT([.J7]/8)*2048+INT([.K7]/4)*32+INT([.L7]/8))" office:value-type="string" office:string-value="0xFC02" calcext:value-type="string">
            <text:p>0xFC02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table:formula="of:=[.M7]" office:value-type="string" office:string-value="0xFC02" calcext:value-type="string">
            <text:p>0xFC02</text:p>
          </table:table-cell>
          <table:table-cell table:formula="of:=HEX2DEC(MID([.H8];3;999))" office:value-type="float" office:value="64514" calcext:value-type="float">
            <text:p>64514</text:p>
          </table:table-cell>
          <table:table-cell table:formula="of:=BITAND([.I8];63488)/2048*8" office:value-type="float" office:value="248" calcext:value-type="float">
            <text:p>248</text:p>
          </table:table-cell>
          <table:table-cell table:formula="of:=BITAND([.I8];2016)/32*4" office:value-type="float" office:value="128" calcext:value-type="float">
            <text:p>128</text:p>
          </table:table-cell>
          <table:table-cell table:formula="of:=BITAND([.I8];31)*8" office:value-type="float" office:value="16" calcext:value-type="float">
            <text:p>16</text:p>
          </table:table-cell>
          <table:table-cell table:formula="of:=&quot;0x&quot;&amp;DEC2HEX(INT([.J8]/8)*2048+INT([.K8]/4)*32+INT([.L8]/8))" office:value-type="string" office:string-value="0xFC02" calcext:value-type="string">
            <text:p>0xFC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14:16:57.3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6T09:22:49.550000000</meta:creation-date>
    <dc:date>2023-08-13T14:40:04.546000000</dc:date>
    <meta:editing-duration>PT6H21M19S</meta:editing-duration>
    <meta:editing-cycles>3</meta:editing-cycles>
    <meta:generator>LibreOffice/6.1.5.2$Windows_X86_64 LibreOffice_project/90f8dcf33c87b3705e78202e3df5142b201bd805</meta:generator>
    <meta:document-statistic meta:table-count="1" meta:cell-count="52" meta:object-count="0"/>
  </office:meta>
</office:document-meta>
</file>