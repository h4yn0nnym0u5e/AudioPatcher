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ffffff" fo:min-height="93.61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3.8mm" svg:height="107.65mm" svg:x="224.83mm" svg:y="196.03mm">
            <draw:text-box>
              <text:p>When a MIDI Note On is received, we want to:</text:p>
              <text:p>* EXCEPT if it’s the first / only playing voice...</text:p>
              <text:p>* ...create copies of all objects marked as “per-voice”: keep in a separate list-of-lists</text:p>
              <text:p>* ...create all internal-only connections</text:p>
              <text:p>* ...create all input connections (coming from “global” objects e.g. master LFO)</text:p>
              <text:p>* ...create only output connections if they go to a mixer object with free inputs</text:p>
              <text:p>* set frequencies for waveform and tracking filter objects from note pitch</text:p>
              <text:p>* send noteOn() to all per-voice envelopes</text:p>
              <text:p>* set other parameters from velocity: TBD</text:p>
              <text:p/>
              <text:p>When MIDI Note Off is received:</text:p>
              <text:p>* send noteOff() to all per-voice envelopes</text:p>
              <text:p>* EXCEPT if the voice is the master design...</text:p>
              <text:p>* ...move per-voice object list to “releasing” list</text:p>
              <text:p/>
              <text:p>When all envelopes in a releasing list entry are inactive:</text:p>
              <text:p>* delete all patchcords connected to them</text:p>
              <text:p>* delete all the objects</text:p>
              <text:p/>
              <text:p>Thoughts:</text:p>
              <text:p>* Allow WaveformDc object to capture note pitch and velocity</text:p>
              <text:p/>
              <text:p/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528a</text:p>
          </table:table-cell>
          <table:table-cell table:formula="of:=HEX2DEC(MID([.H3];3;999))" office:value-type="float" office:value="21130" calcext:value-type="float">
            <text:p>21130</text:p>
          </table:table-cell>
          <table:table-cell table:formula="of:=BITAND([.I3];63488)/2048*8" office:value-type="float" office:value="80" calcext:value-type="float">
            <text:p>80</text:p>
          </table:table-cell>
          <table:table-cell table:formula="of:=BITAND([.I3];2016)/32*4" office:value-type="float" office:value="80" calcext:value-type="float">
            <text:p>80</text:p>
          </table:table-cell>
          <table:table-cell table:formula="of:=BITAND([.I3];31)*8" office:value-type="float" office:value="80" calcext:value-type="float">
            <text:p>80</text:p>
          </table:table-cell>
          <table:table-cell table:formula="of:=&quot;0x&quot;&amp;DEC2HEX(INT([.J3]/8)*2048+INT([.K3]/4)*32+INT([.L3]/8))" office:value-type="string" office:string-value="0x528A" calcext:value-type="string">
            <text:p>0x528A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table:number-columns-repeated="2" office:value-type="float" office:value="80" calcext:value-type="float">
            <text:p>80</text:p>
          </table:table-cell>
          <table:table-cell table:formula="of:=[.K4]" office:value-type="float" office:value="80" calcext:value-type="float">
            <text:p>80</text:p>
          </table:table-cell>
          <table:table-cell table:formula="of:=&quot;0x&quot;&amp;DEC2HEX(INT([.J4]/8)*2048+INT([.K4]/4)*32+INT([.L4]/8))" office:value-type="string" office:string-value="0x528A" calcext:value-type="string">
            <text:p>0x528A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528A" calcext:value-type="string">
            <text:p>0x528A</text:p>
          </table:table-cell>
          <table:table-cell table:formula="of:=HEX2DEC(MID([.H5];3;999))" office:value-type="float" office:value="21130" calcext:value-type="float">
            <text:p>21130</text:p>
          </table:table-cell>
          <table:table-cell table:formula="of:=BITAND([.I5];63488)/2048*8" office:value-type="float" office:value="80" calcext:value-type="float">
            <text:p>80</text:p>
          </table:table-cell>
          <table:table-cell table:formula="of:=BITAND([.I5];2016)/32*4" office:value-type="float" office:value="80" calcext:value-type="float">
            <text:p>80</text:p>
          </table:table-cell>
          <table:table-cell table:formula="of:=BITAND([.I5];31)*8" office:value-type="float" office:value="80" calcext:value-type="float">
            <text:p>80</text:p>
          </table:table-cell>
          <table:table-cell table:formula="of:=&quot;0x&quot;&amp;DEC2HEX(INT([.J5]/8)*2048+INT([.K5]/4)*32+INT([.L5]/8))" office:value-type="string" office:string-value="0x528A" calcext:value-type="string">
            <text:p>0x52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table:formula="of:=LOG([.O25])/LOG(2)" office:value-type="float" office:value="9.64385618977473" calcext:value-type="float">
            <text:p>9.64385618977473</text:p>
          </table:table-cell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6"/>
          <table:table-cell office:value-type="string" calcext:value-type="string">
            <text:p>MIDI setting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Waveform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amp sca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8"/>
          <table:table-cell table:style-name="ce9" office:value-type="string" calcext:value-type="string">
            <text:p>CC</text:p>
          </table:table-cell>
          <table:table-cell office:value-type="string" calcext:value-type="string">
            <text:p>pulse wid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envelope</text:p>
          </table:table-cell>
          <table:table-cell table:style-name="ce8" office:value-type="string" calcext:value-type="string">
            <text:p>note 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WaveformDc</text:p>
          </table:table-cell>
          <table:table-cell table:style-name="ce9" office:value-type="string" calcext:value-type="string">
            <text:p>CC</text:p>
          </table:table-cell>
          <table:table-cell office:value-type="string" calcext:value-type="string">
            <text:p>amplitu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Ladder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7"/>
          <table:table-cell office:value-type="string" calcext:value-type="string">
            <text:p>Biquad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SVF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Need to track attached CCs for when new note starts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9:43:51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9-07T20:09:17.654000000</dc:date>
    <meta:editing-duration>PT19H50M45S</meta:editing-duration>
    <meta:editing-cycles>14</meta:editing-cycles>
    <meta:generator>LibreOffice/6.1.5.2$Windows_X86_64 LibreOffice_project/90f8dcf33c87b3705e78202e3df5142b201bd805</meta:generator>
    <meta:document-statistic meta:table-count="2" meta:cell-count="303" meta:object-count="1"/>
  </office:meta>
</office:document-meta>
</file>